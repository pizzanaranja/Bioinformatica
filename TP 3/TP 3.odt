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bf0041" loext:opacity="100%" officeooo:rsid="0003d246" officeooo:paragraph-rsid="0003d246"/>
    </style:style>
    <style:style style:name="P2" style:family="paragraph" style:parent-style-name="Standard">
      <style:paragraph-properties fo:text-align="justify" style:justify-single-word="false"/>
      <style:text-properties officeooo:paragraph-rsid="00072552"/>
    </style:style>
    <style:style style:name="P3" style:family="paragraph" style:parent-style-name="Standard">
      <style:paragraph-properties fo:text-align="justify" style:justify-single-word="false"/>
      <style:text-properties officeooo:paragraph-rsid="0027ccc6"/>
    </style:style>
    <style:style style:name="P4" style:family="paragraph" style:parent-style-name="Standard">
      <style:paragraph-properties fo:text-align="justify" style:justify-single-word="false"/>
      <style:text-properties officeooo:paragraph-rsid="0019c75e"/>
    </style:style>
    <style:style style:name="P5" style:family="paragraph" style:parent-style-name="Standard">
      <style:paragraph-properties fo:text-align="justify" style:justify-single-word="false"/>
      <style:text-properties officeooo:paragraph-rsid="001c26b4"/>
    </style:style>
    <style:style style:name="P6" style:family="paragraph" style:parent-style-name="Standard">
      <style:paragraph-properties fo:text-align="justify" style:justify-single-word="false"/>
      <style:text-properties officeooo:paragraph-rsid="001de21b"/>
    </style:style>
    <style:style style:name="P7" style:family="paragraph" style:parent-style-name="Standard">
      <style:paragraph-properties fo:text-align="justify" style:justify-single-word="false"/>
      <style:text-properties officeooo:paragraph-rsid="001e73b0"/>
    </style:style>
    <style:style style:name="P8" style:family="paragraph" style:parent-style-name="Standard">
      <style:paragraph-properties fo:text-align="justify" style:justify-single-word="false"/>
      <style:text-properties officeooo:paragraph-rsid="0020bdd8"/>
    </style:style>
    <style:style style:name="P9" style:family="paragraph" style:parent-style-name="Standard">
      <style:paragraph-properties fo:text-align="justify" style:justify-single-word="false"/>
      <style:text-properties officeooo:paragraph-rsid="00222353"/>
    </style:style>
    <style:style style:name="P10" style:family="paragraph" style:parent-style-name="Standard">
      <style:paragraph-properties fo:text-align="justify" style:justify-single-word="false"/>
      <style:text-properties officeooo:paragraph-rsid="00233d15"/>
    </style:style>
    <style:style style:name="P11" style:family="paragraph" style:parent-style-name="Standard">
      <style:paragraph-properties fo:text-align="justify" style:justify-single-word="false"/>
      <style:text-properties officeooo:paragraph-rsid="00252ce6"/>
    </style:style>
    <style:style style:name="P12" style:family="paragraph" style:parent-style-name="Standard">
      <style:paragraph-properties fo:text-align="justify" style:justify-single-word="false"/>
      <style:text-properties officeooo:paragraph-rsid="002ae51a"/>
    </style:style>
    <style:style style:name="P13" style:family="paragraph" style:parent-style-name="Standard">
      <style:paragraph-properties fo:text-align="justify" style:justify-single-word="false"/>
      <style:text-properties officeooo:rsid="0003d246" officeooo:paragraph-rsid="0003d246"/>
    </style:style>
    <style:style style:name="P14" style:family="paragraph" style:parent-style-name="Standard">
      <style:paragraph-properties fo:text-align="justify" style:justify-single-word="false"/>
      <style:text-properties officeooo:rsid="00072552" officeooo:paragraph-rsid="00072552"/>
    </style:style>
    <style:style style:name="P15" style:family="paragraph" style:parent-style-name="Standard">
      <style:paragraph-properties fo:text-align="justify" style:justify-single-word="false"/>
      <style:text-properties fo:color="#800080" loext:opacity="100%" officeooo:rsid="000baca9" officeooo:paragraph-rsid="000baca9"/>
    </style:style>
    <style:style style:name="P16" style:family="paragraph" style:parent-style-name="Standard">
      <style:paragraph-properties fo:text-align="justify" style:justify-single-word="false"/>
      <style:text-properties fo:color="#800080" loext:opacity="100%" officeooo:rsid="000baf2b" officeooo:paragraph-rsid="000baf2b"/>
    </style:style>
    <style:style style:name="P17" style:family="paragraph" style:parent-style-name="Standard">
      <style:paragraph-properties fo:text-align="justify" style:justify-single-word="false"/>
      <style:text-properties officeooo:rsid="000baf2b" officeooo:paragraph-rsid="000baf2b"/>
    </style:style>
    <style:style style:name="P18" style:family="paragraph" style:parent-style-name="Standard">
      <style:paragraph-properties fo:text-align="justify" style:justify-single-word="false"/>
      <style:text-properties officeooo:rsid="000cb440" officeooo:paragraph-rsid="000cb440"/>
    </style:style>
    <style:style style:name="P19" style:family="paragraph" style:parent-style-name="Standard">
      <style:paragraph-properties fo:text-align="justify" style:justify-single-word="false"/>
      <style:text-properties officeooo:rsid="000dc2c3" officeooo:paragraph-rsid="000dc2c3"/>
    </style:style>
    <style:style style:name="P20" style:family="paragraph" style:parent-style-name="Standard">
      <style:paragraph-properties fo:text-align="justify" style:justify-single-word="false"/>
      <style:text-properties officeooo:rsid="00148b2f" officeooo:paragraph-rsid="00148b2f"/>
    </style:style>
    <style:style style:name="P21" style:family="paragraph" style:parent-style-name="Standard">
      <style:paragraph-properties fo:text-align="justify" style:justify-single-word="false"/>
      <style:text-properties officeooo:rsid="0015243f" officeooo:paragraph-rsid="0015243f"/>
    </style:style>
    <style:style style:name="P22" style:family="paragraph" style:parent-style-name="Standard">
      <style:paragraph-properties fo:text-align="justify" style:justify-single-word="false"/>
      <style:text-properties style:use-window-font-color="true" loext:opacity="0%" officeooo:rsid="0016fe5e" officeooo:paragraph-rsid="0016fe5e"/>
    </style:style>
    <style:style style:name="P23" style:family="paragraph" style:parent-style-name="Standard">
      <style:paragraph-properties fo:text-align="justify" style:justify-single-word="false"/>
      <style:text-properties style:use-window-font-color="true" loext:opacity="0%" officeooo:rsid="0018d96c" officeooo:paragraph-rsid="0018d96c"/>
    </style:style>
    <style:style style:name="P24" style:family="paragraph" style:parent-style-name="Standard">
      <style:paragraph-properties fo:text-align="justify" style:justify-single-word="false"/>
      <style:text-properties style:use-window-font-color="true" loext:opacity="0%" officeooo:rsid="00199674" officeooo:paragraph-rsid="00199674"/>
    </style:style>
    <style:style style:name="P25" style:family="paragraph" style:parent-style-name="Text_20_body">
      <style:paragraph-properties fo:text-align="center" style:justify-single-word="false"/>
      <style:text-properties fo:color="#808080" loext:opacity="100%" fo:font-style="italic" officeooo:rsid="002d2783" officeooo:paragraph-rsid="002d2783" style:font-style-asian="italic" style:font-style-complex="italic"/>
    </style:style>
    <style:style style:name="P26" style:family="paragraph" style:parent-style-name="Heading_20_1">
      <style:paragraph-properties fo:text-align="center" style:justify-single-word="false"/>
      <style:text-properties fo:font-style="italic" officeooo:rsid="0027ccc6" officeooo:paragraph-rsid="0027ccc6" style:font-style-asian="italic" style:font-style-complex="italic"/>
    </style:style>
    <style:style style:name="P27" style:family="paragraph" style:parent-style-name="Heading_20_1">
      <style:paragraph-properties fo:text-align="center" style:justify-single-word="false"/>
      <style:text-properties fo:font-style="italic" style:font-style-asian="italic" style:font-style-complex="italic"/>
    </style:style>
    <style:style style:name="P28" style:family="paragraph" style:parent-style-name="Heading_20_2">
      <style:paragraph-properties fo:text-align="justify" style:justify-single-word="false"/>
    </style:style>
    <style:style style:name="P29" style:family="paragraph" style:parent-style-name="Subtitle">
      <style:paragraph-properties fo:text-align="center" style:justify-single-word="false"/>
      <style:text-properties fo:color="#808080" loext:opacity="100%" fo:font-style="italic" officeooo:paragraph-rsid="002d2783" style:font-style-asian="italic" style:font-style-complex="italic"/>
    </style:style>
    <style:style style:name="T1" style:family="text">
      <style:text-properties officeooo:rsid="0027ccc6"/>
    </style:style>
    <style:style style:name="T2" style:family="text">
      <style:text-properties officeooo:rsid="00273810"/>
    </style:style>
    <style:style style:name="T3" style:family="text">
      <style:text-properties officeooo:rsid="002672d8"/>
    </style:style>
    <style:style style:name="T4" style:family="text">
      <style:text-properties officeooo:rsid="0007e43b"/>
    </style:style>
    <style:style style:name="T5" style:family="text">
      <style:text-properties officeooo:rsid="00090783"/>
    </style:style>
    <style:style style:name="T6" style:family="text">
      <style:text-properties officeooo:rsid="0009c4e9"/>
    </style:style>
    <style:style style:name="T7" style:family="text">
      <style:text-properties officeooo:rsid="0004cf84"/>
    </style:style>
    <style:style style:name="T8" style:family="text">
      <style:text-properties officeooo:rsid="000674f7"/>
    </style:style>
    <style:style style:name="T9" style:family="text">
      <style:text-properties officeooo:rsid="00072552"/>
    </style:style>
    <style:style style:name="T10" style:family="text">
      <style:text-properties officeooo:rsid="000baca9"/>
    </style:style>
    <style:style style:name="T11" style:family="text">
      <style:text-properties style:use-window-font-color="true" loext:opacity="0%"/>
    </style:style>
    <style:style style:name="T12" style:family="text">
      <style:text-properties style:use-window-font-color="true" loext:opacity="0%" officeooo:rsid="000baf2b"/>
    </style:style>
    <style:style style:name="T13" style:family="text">
      <style:text-properties style:use-window-font-color="true" loext:opacity="0%" officeooo:rsid="00273810"/>
    </style:style>
    <style:style style:name="T14" style:family="text">
      <style:text-properties style:use-window-font-color="true" loext:opacity="0%" officeooo:rsid="000dc2c3"/>
    </style:style>
    <style:style style:name="T15" style:family="text">
      <style:text-properties style:use-window-font-color="true" loext:opacity="0%" officeooo:rsid="000cb440"/>
    </style:style>
    <style:style style:name="T16" style:family="text">
      <style:text-properties style:use-window-font-color="true" loext:opacity="0%" officeooo:rsid="0019c75e"/>
    </style:style>
    <style:style style:name="T17" style:family="text">
      <style:text-properties style:use-window-font-color="true" loext:opacity="0%" officeooo:rsid="002d2783"/>
    </style:style>
    <style:style style:name="T18" style:family="text">
      <style:text-properties officeooo:rsid="0028e700"/>
    </style:style>
    <style:style style:name="T19" style:family="text">
      <style:text-properties officeooo:rsid="000baf2b"/>
    </style:style>
    <style:style style:name="T20" style:family="text">
      <style:text-properties officeooo:rsid="000dc2c3"/>
    </style:style>
    <style:style style:name="T21" style:family="text">
      <style:text-properties officeooo:rsid="000e905d"/>
    </style:style>
    <style:style style:name="T22" style:family="text">
      <style:text-properties officeooo:rsid="0010641e"/>
    </style:style>
    <style:style style:name="T23" style:family="text">
      <style:text-properties officeooo:rsid="0011f782"/>
    </style:style>
    <style:style style:name="T24" style:family="text">
      <style:text-properties officeooo:rsid="0013f576"/>
    </style:style>
    <style:style style:name="T25" style:family="text">
      <style:text-properties officeooo:rsid="0016fe5e"/>
    </style:style>
    <style:style style:name="T26" style:family="text">
      <style:text-properties fo:color="#000000" loext:opacity="100%" officeooo:rsid="00273810"/>
    </style:style>
    <style:style style:name="T27" style:family="text">
      <style:text-properties fo:color="#000000" loext:opacity="100%" officeooo:rsid="0016fe5e"/>
    </style:style>
    <style:style style:name="T28" style:family="text">
      <style:text-properties fo:color="#000000" loext:opacity="100%" officeooo:rsid="002e5eb5"/>
    </style:style>
    <style:style style:name="T29" style:family="text">
      <style:text-properties fo:color="#f10d0c" loext:opacity="100%" officeooo:rsid="0016fe5e"/>
    </style:style>
    <style:style style:name="T30" style:family="text">
      <style:text-properties officeooo:rsid="00178e05"/>
    </style:style>
    <style:style style:name="T31" style:family="text">
      <style:text-properties officeooo:rsid="00199674"/>
    </style:style>
    <style:style style:name="T32" style:family="text">
      <style:text-properties officeooo:rsid="0019c75e"/>
    </style:style>
    <style:style style:name="T33" style:family="text">
      <style:text-properties officeooo:rsid="001a2e18"/>
    </style:style>
    <style:style style:name="T34" style:family="text">
      <style:text-properties officeooo:rsid="001c26b4"/>
    </style:style>
    <style:style style:name="T35" style:family="text">
      <style:text-properties officeooo:rsid="001c42b8"/>
    </style:style>
    <style:style style:name="T36" style:family="text">
      <style:text-properties fo:font-style="normal" style:font-style-asian="normal" style:font-style-complex="normal"/>
    </style:style>
    <style:style style:name="T37" style:family="text">
      <style:text-properties fo:font-style="normal" officeooo:rsid="001c42b8" style:font-style-asian="normal" style:font-style-complex="normal"/>
    </style:style>
    <style:style style:name="T38" style:family="text">
      <style:text-properties fo:font-style="normal" fo:font-weight="normal" officeooo:rsid="001c42b8" style:font-style-asian="normal" style:font-weight-asian="normal" style:font-style-complex="normal" style:font-weight-complex="normal"/>
    </style:style>
    <style:style style:name="T39" style:family="text">
      <style:text-properties fo:font-style="normal" fo:font-weight="normal" officeooo:rsid="001de21b" style:font-style-asian="normal" style:font-weight-asian="normal" style:font-style-complex="normal" style:font-weight-complex="normal"/>
    </style:style>
    <style:style style:name="T40" style:family="text">
      <style:text-properties fo:font-style="normal" fo:font-weight="normal" officeooo:rsid="001e73b0" style:font-style-asian="normal" style:font-weight-asian="normal" style:font-style-complex="normal" style:font-weight-complex="normal"/>
    </style:style>
    <style:style style:name="T41" style:family="text">
      <style:text-properties fo:font-style="normal" fo:font-weight="normal" officeooo:rsid="001f5c0d" style:font-style-asian="normal" style:font-weight-asian="normal" style:font-style-complex="normal" style:font-weight-complex="normal"/>
    </style:style>
    <style:style style:name="T42" style:family="text">
      <style:text-properties fo:font-style="normal" fo:font-weight="normal" officeooo:rsid="0020bdd8" style:font-style-asian="normal" style:font-weight-asian="normal" style:font-style-complex="normal" style:font-weight-complex="normal"/>
    </style:style>
    <style:style style:name="T43" style:family="text">
      <style:text-properties fo:font-style="normal" fo:font-weight="normal" officeooo:rsid="00222353" style:font-style-asian="normal" style:font-weight-asian="normal" style:font-style-complex="normal" style:font-weight-complex="normal"/>
    </style:style>
    <style:style style:name="T44" style:family="text">
      <style:text-properties fo:font-style="normal" fo:font-weight="normal" officeooo:rsid="0028e700" style:font-style-asian="normal" style:font-weight-asian="normal" style:font-style-complex="normal" style:font-weight-complex="normal"/>
    </style:style>
    <style:style style:name="T45" style:family="text">
      <style:text-properties fo:font-style="normal" fo:font-weight="normal" officeooo:rsid="0022df03" style:font-style-asian="normal" style:font-weight-asian="normal" style:font-style-complex="normal" style:font-weight-complex="normal"/>
    </style:style>
    <style:style style:name="T46" style:family="text">
      <style:text-properties fo:font-style="normal" fo:font-weight="normal" officeooo:rsid="00233d15" style:font-style-asian="normal" style:font-weight-asian="normal" style:font-style-complex="normal" style:font-weight-complex="normal"/>
    </style:style>
    <style:style style:name="T47" style:family="text">
      <style:text-properties fo:font-style="normal" fo:font-weight="normal" officeooo:rsid="00252ce6" style:font-style-asian="normal" style:font-weight-asian="normal" style:font-style-complex="normal" style:font-weight-complex="normal"/>
    </style:style>
    <style:style style:name="T48" style:family="text">
      <style:text-properties fo:font-style="normal" fo:font-weight="normal" officeooo:rsid="002ae51a" style:font-style-asian="normal" style:font-weight-asian="normal" style:font-style-complex="normal" style:font-weight-complex="normal"/>
    </style:style>
    <style:style style:name="T49" style:family="text">
      <style:text-properties fo:font-style="normal" fo:font-weight="normal" officeooo:rsid="002bc8a0" style:font-style-asian="normal" style:font-weight-asian="normal" style:font-style-complex="normal" style:font-weight-complex="normal"/>
    </style:style>
    <style:style style:name="T50" style:family="text">
      <style:text-properties fo:font-style="normal" fo:font-weight="normal" officeooo:rsid="002e5eb5" style:font-style-asian="normal" style:font-weight-asian="normal" style:font-style-complex="normal" style:font-weight-complex="normal"/>
    </style:style>
    <style:style style:name="T51" style:family="text">
      <style:text-properties officeooo:rsid="001de21b"/>
    </style:style>
    <style:style style:name="T52" style:family="text">
      <style:text-properties officeooo:rsid="002d2783"/>
    </style:style>
    <style:style style:name="T53" style:family="text">
      <style:text-properties fo:color="#c9211e" loext:opacity="100%"/>
    </style:style>
    <style:style style:name="T54" style:family="text">
      <style:text-properties fo:color="#c9211e" loext:opacity="100%" officeooo:rsid="00072552"/>
    </style:style>
    <style:style style:name="T55" style:family="text">
      <style:text-properties fo:color="#c9211e" loext:opacity="100%" officeooo:rsid="00273810"/>
    </style:style>
    <style:style style:name="T56" style:family="text">
      <style:text-properties fo:color="#c9211e" loext:opacity="100%" officeooo:rsid="0019c75e"/>
    </style:style>
    <style:style style:name="T57" style:family="text">
      <style:text-properties fo:color="#c9211e" loext:opacity="100%" officeooo:rsid="001c26b4"/>
    </style:style>
    <style:style style:name="T58" style:family="text">
      <style:text-properties fo:color="#c9211e" loext:opacity="100%" fo:font-weight="normal" officeooo:rsid="001de21b" style:font-weight-asian="normal" style:font-weight-complex="normal"/>
    </style:style>
    <style:style style:name="T59" style:family="text">
      <style:text-properties fo:color="#c9211e" loext:opacity="100%" fo:font-style="normal" fo:font-weight="normal" officeooo:rsid="001de21b" style:font-style-asian="normal" style:font-weight-asian="normal" style:font-style-complex="normal" style:font-weight-complex="normal"/>
    </style:style>
    <style:style style:name="T60" style:family="text">
      <style:text-properties fo:color="#c9211e" loext:opacity="100%" fo:font-style="normal" fo:font-weight="normal" officeooo:rsid="001e73b0" style:font-style-asian="normal" style:font-weight-asian="normal" style:font-style-complex="normal" style:font-weight-complex="normal"/>
    </style:style>
    <style:style style:name="T61" style:family="text">
      <style:text-properties fo:color="#c9211e" loext:opacity="100%" fo:font-style="normal" fo:font-weight="normal" officeooo:rsid="001f5c0d" style:font-style-asian="normal" style:font-weight-asian="normal" style:font-style-complex="normal" style:font-weight-complex="normal"/>
    </style:style>
    <style:style style:name="T62" style:family="text">
      <style:text-properties fo:color="#c9211e" loext:opacity="100%" fo:font-style="normal" fo:font-weight="normal" officeooo:rsid="0020bdd8" style:font-style-asian="normal" style:font-weight-asian="normal" style:font-style-complex="normal" style:font-weight-complex="normal"/>
    </style:style>
    <style:style style:name="T63" style:family="text">
      <style:text-properties fo:color="#c9211e" loext:opacity="100%" fo:font-style="normal" fo:font-weight="normal" officeooo:rsid="00252ce6" style:font-style-asian="normal" style:font-weight-asian="normal" style:font-style-complex="normal" style:font-weight-complex="normal"/>
    </style:style>
    <style:style style:name="T64" style:family="text">
      <style:text-properties officeooo:rsid="002e5eb5"/>
    </style:style>
    <style:style style:name="T65" style:family="text">
      <style:text-properties fo:font-weight="normal" officeooo:rsid="001de21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troducción a la Bioinformática Molecular.</text:h>
      <text:h text:style-name="P27" text:outline-level="1">T<text:span text:style-name="T1">rabajo </text:span>P<text:span text:style-name="T1">ráctico</text:span> 3</text:h>
      <text:p text:style-name="P29">Ángel Nicolás Gauto</text:p>
      <text:p text:style-name="P29"><text:span text:style-name="T52">Manel Montalat</text:span></text:p>
      <text:p text:style-name="P25"/>
      <text:p text:style-name="P1"/>
      <text:h text:style-name="P28" text:outline-level="2">Ejercicio 1 – <text:span text:style-name="T2">Dominios en Conserved domains</text:span></text:h>
      <text:p text:style-name="P13"/>
      <text:p text:style-name="P13"><text:span text:style-name="T53">1a)</text:span> <text:span text:style-name="T3">U</text:span><text:span text:style-name="T4">tiliza</text:span><text:span text:style-name="T3">mos</text:span><text:span text:style-name="T4"> blastp </text:span><text:span text:style-name="T3">ya que estamos trabajando con proteínas</text:span><text:span text:style-name="T4">, y la base de datos refseq_select ya que tiene datos no redundantes e ignora las isoformes.</text:span> <text:span text:style-name="T4">O</text:span>bservamos que la gran mayoría de los hits son <text:span text:style-name="T3">mayormente hemoproteinas</text:span> <text:span text:style-name="T3">con dominios</text:span> hem<text:span text:style-name="T4">e</text:span> NO-binding domain-containing, <text:span text:style-name="T4">que es la proteína query pero en otras especies de </text:span><text:span text:style-name="T52">C</text:span><text:span text:style-name="T4">lostridium. </text:span><text:span text:style-name="T5">También aparece en otras especies similares. Su grupo prostético es hemo, </text:span><text:span text:style-name="T3">el cual une</text:span><text:span text:style-name="T5"> mol</text:span><text:span text:style-name="T3">é</text:span><text:span text:style-name="T5">cula</text:span><text:span text:style-name="T3">s</text:span><text:span text:style-name="T5"> de óxido nítrico y su función es la misma que la descrita en el TP.</text:span></text:p>
      <text:p text:style-name="P13"/>
      <text:p text:style-name="P13"><text:span text:style-name="T53">2a)</text:span> Las de C. tetani están muy poco conservadas, ya que no alcanzan el 40% de identidad y la cobertura es menor al 50%. <text:span text:style-name="T6">Aparecen proteínas homólogas en miembros de la familia Haloimpatiens, Inconstantimicrobium mannanitabidum, Desnuesiella massiliensis, Vallitalea okinawensis y otros, ya que tienen una identidad entre 60 y 50%, con una cobertura de 97% y un e-value de 0.</text:span></text:p>
      <text:p text:style-name="P13"/>
      <text:p text:style-name="P13"><text:span text:style-name="T53">1b)</text:span> <text:span text:style-name="T7">Presenta 2 dominios, las HNOB (heme NO-binding) y Tar. El primero proviene de </text:span><text:span text:style-name="T8">PFAM del NCBI, </text:span><text:span text:style-name="T3">es un dominio sensor, une hemo y detecta oxido nitrico, su función es contener al grupo prostetico hemo, detectar oxido nitrico y participar en señalización/redox, esta presente en animales y bacterias</text:span><text:span text:style-name="T7">. El segundo proviene de </text:span><text:span text:style-name="T8">la base de datos COG del NCBI</text:span><text:span text:style-name="T7"> y su función es ser un sensor ambiental, detectando sustancias químicas en el entorno para enviar una señal al interior de la bacteria </text:span><text:span text:style-name="T3">y de esta manera promover una respuesta frente al ambiente.</text:span></text:p>
      <text:p text:style-name="P13"/>
      <text:h text:style-name="P28" text:outline-level="2">Ejercicio 2 – <text:span text:style-name="T2">InterPro y PFAM</text:span></text:h>
      <text:p text:style-name="P14"/>
      <text:p text:style-name="P2"><text:span text:style-name="T54">2a)</text:span><text:span text:style-name="T9"> </text:span><text:span text:style-name="T10">Aparecen dominios como:</text:span></text:p>
      <text:p text:style-name="P2"/>
      <text:p text:style-name="P3"><text:span text:style-name="T2">* </text:span>HNOB / Heme NO-binding domain: proveniente de la base de datos Pfam (PF07700). Este dominio corresponde a proteínas capaces de unir un grupo hemo y detectar moléculas gaseosas como NO (óxido nítrico).</text:p>
      <text:p text:style-name="P3"/>
      <text:p text:style-name="P3"><text:span text:style-name="T2">* </text:span>H-NOX domain superfamily, identificado por CATH-Gene3D, relacionado estructuralmente con dominios sensores de gases.</text:p>
      <text:p text:style-name="P3"/>
      <text:p text:style-name="P3"><text:span text:style-name="T2">* </text:span>NO signalling/Golgi transport ligand-binding domain superfamily, identificado por SUPERFAMILY/SSF, también asociado a unión de ligandos gaseosos.</text:p>
      <text:p text:style-name="P3"><text:soft-page-break/><text:line-break/><text:span text:style-name="T2">* </text:span>Un dominio relacionado con Methyl-accepting chemotaxis proteins (MCPs), asociado a proteínas de transducción de señales y quimiotaxis bacteriana.</text:p>
      <text:p text:style-name="P2"/>
      <text:p text:style-name="P15"><text:span text:style-name="T53">2b)</text:span><text:span text:style-name="T11"> </text:span><text:span text:style-name="T12">Esperamos que se conserve la histid</text:span><text:span text:style-name="T17">i</text:span><text:span text:style-name="T12">na </text:span><text:span text:style-name="T13">ya que actúa</text:span><text:span text:style-name="T12"> como ligando del hemo</text:span><text:span text:style-name="T13">.</text:span></text:p>
      <text:p text:style-name="P15"><text:span text:style-name="T12"/></text:p>
      <text:p text:style-name="P16"><text:span text:style-name="T53">2c)</text:span> <text:span text:style-name="T11">Efectivamente, se puede observar que la histidina se encuentra alineada en todas las secuencias </text:span><text:span text:style-name="T14">de la columna 137</text:span><text:span text:style-name="T15">, </text:span><text:span text:style-name="T13">por lo que este aminoácido se encuentra conservado entre los distintas secuencias analizadas.</text:span></text:p>
      <text:p text:style-name="P17"/>
      <text:p text:style-name="P18"><text:span text:style-name="T53">2d)</text:span> <text:span text:style-name="T18">Otros aminoácidos conservados son</text:span><text:span text:style-name="T19"> la </text:span>arginina <text:span text:style-name="T20">en la columna 175</text:span><text:span text:style-name="T19">, la glicina </text:span><text:span text:style-name="T21">en la 2</text:span><text:span text:style-name="T19"> y la prolina </text:span><text:span text:style-name="T20">en la 154</text:span><text:span text:style-name="T19">. </text:span>Se conservan ligeramente <text:span text:style-name="T21">el aspartato en la 138</text:span> y la <text:span text:style-name="T21">glicina en la 115</text:span>. <text:span text:style-name="T20">Hay una inserción alrededor de la columna 116, y otra en la 140.</text:span></text:p>
      <text:p text:style-name="P18"/>
      <text:p text:style-name="P19"><text:span text:style-name="T53">2e)</text:span> <text:span text:style-name="T22">Como el logo no toma en cuenta las inserciones por la cantidad de gaps, muchas de las columnas están en posiciones anteriores a las anotadas en el ítem anterior. L</text:span><text:span text:style-name="T23">as posiciones mas importantes son la 2 (glicina), 41 (tirosina, valina), 69 (glicina), 81 (tirosina, fenilalanina), 95 (fenilalanina, leucina), 103 (histidina), 116 (prolina), </text:span><text:span text:style-name="T24">132 (tirosina), 134 (serina), 136 (arginina, lisina), 145 (glicina), y 154 (fenilalanina, tirosina). </text:span><text:span text:style-name="T52">Los porcentajes de inserción son 44% en la columna 31, 41% en la columna 103 y 37% en la columna 152.</text:span></text:p>
      <text:p text:style-name="P19"/>
      <text:p text:style-name="P20"><text:span text:style-name="T53">2f)</text:span> La histidina conservada del ejercicio 2b está en la posición 103 según el logo. <text:span text:style-name="T2">R</text:span>epresenta una ocupación muy alta (aprox 0,995) indicando que esta presente en casi todas las secuencias del alineamiento, ademas que la H tiene una probabilidad muy elevada dentro de la columna.</text:p>
      <text:p text:style-name="P20"/>
      <text:p text:style-name="P21"><text:span text:style-name="T53">2g)</text:span> En el texto, se observa que la histidina en la posición 103 tiene una de las probabilidades mas bajas de ser emitida en un match, que es lo opuesto a lo que esperábamos. <text:span text:style-name="T25">La arginina conservada también es la de menor probabilidades, lo mismo pasa con la prolina y la glicina. </text:span><text:span text:style-name="T26">L</text:span><text:span text:style-name="T27">o que interpret</text:span><text:span text:style-name="T26">amos</text:span><text:span text:style-name="T27"> es que como en el Pfam/HMMER los valores son scores transformados (log-odds), </text:span><text:span text:style-name="T28">los </text:span><text:span text:style-name="T27">números mas pequeños son aminoácidos mas favorecidos o conservados, por lo que si la histidina en esta posición tiene un 0,22 significa que </text:span><text:span text:style-name="T26">es muy probable que este lugar sea ocupado por una histidina, </text:span><text:span text:style-name="T28">y entonces estaría</text:span><text:span text:style-name="T27"> fuertemente conservada en esta posición.</text:span></text:p>
      <text:p text:style-name="P21"><text:span text:style-name="T29"/></text:p>
      <text:p text:style-name="P22"><text:span text:style-name="T53">2h)</text:span> <text:span text:style-name="T30">Se puede combinar </text:span><text:span text:style-name="T2">con HNOB se muestran como “barras de colores” cercanos al dominio, estos son: </text:span><text:span text:style-name="T30">MCPsignal, guanilato_cyc, HNOBA, PAS_9, PAS_4 , PDEase_I entre otras.</text:span></text:p>
      <text:p text:style-name="P22"/>
      <text:p text:style-name="P23"><text:span text:style-name="T53">2i)</text:span> Hay 116 especies de Clostridium, y tiene 153 secuencias. Otras especies de Clostridium que tienen el dominio HNOB son Botulinum, Perfringens, Beijerinckii, Sporogenes y Kluyveri entre otros. </text:p>
      <text:p text:style-name="P23"/>
      <text:p text:style-name="P23"><text:span text:style-name="T55">2j)</text:span><text:span text:style-name="T2"> </text:span>El dominio MCPsignal puede combinarse con otros dominios como HAMP, Tar3, 4HB_MCP­₁ y PAS_3. <text:span text:style-name="T31">Los aminoácidos conservados son la glutamina en la columna 48, asparagina en la </text:span><text:span text:style-name="T64">colu</text:span><text:span text:style-name="T31">mna 50 y 55, arginina en la </text:span><text:span text:style-name="T64">columna </text:span><text:span text:style-name="T31">62, glicina en </text:span><text:span text:style-name="T64">las columnas </text:span><text:span text:style-name="T31">64, 67 y 69, fenilalanina en </text:span><text:span text:style-name="T64">la columna </text:span><text:span text:style-name="T31">70, glutamato en </text:span><text:span text:style-name="T64">la columna </text:span><text:span text:style-name="T31">76 y leucina en </text:span><text:span text:style-name="T64">la columna </text:span><text:span text:style-name="T31">80. Su función en transducir señales a ChoA (proteína quinasa) la cual es fundamental en la quimiotaxis bacteriana, por lo que se halla principalmente en bacterias.</text:span></text:p>
      <text:p text:style-name="P23"/>
      <text:h text:style-name="P28" text:outline-level="2">Ejercicio 3 – <text:span text:style-name="T2">Prosite y Patrones</text:span></text:h>
      <text:p text:style-name="P24"/>
      <text:p text:style-name="P4"><text:span text:style-name="T56">3a)</text:span><text:span text:style-name="T16"> El signature que se halla es </text:span>R-T-E-[EQ]-Q-x(2)-[SA]-[LIVM]-x-[EQ]-T-A-A-S-M-E-Q-L-T-A-T-V, <text:span text:style-name="T32">por lo tanto es un patrón con expresiones regulares en </text:span><text:span text:style-name="T2">ve</text:span><text:span text:style-name="T32">z de una matriz con probabilidades. </text:span><text:soft-page-break/><text:span text:style-name="T33">En el logo se puede observar que no hay ninguna histidina conservada, </text:span><text:span text:style-name="T64">así p</text:span><text:span text:style-name="T33">odemos descartar que pertenezca a HNOB, y como la descripción habla sobre transducción de señales químicas y methyl-accepting sites, concluimos que el dominio al que pertenece es MCPsignal.</text:span></text:p>
      <text:p text:style-name="P4"/>
      <text:p text:style-name="P5"><text:span text:style-name="T57">3b)</text:span><text:span text:style-name="T34"> Viendo el logo desde la columna 130, decidimos ingresar el patrón [LIM]-x-Y-x-S-x-R-x(2)-[LMF]. </text:span><text:span text:style-name="T35">Aparecen múltiples proteínas del </text:span><text:span text:style-name="Emphasis"><text:span text:style-name="T36">African swine fever virus</text:span></text:span><text:span text:style-name="Emphasis">, </text:span><text:span text:style-name="Emphasis"><text:span text:style-name="T37">la proteína </text:span></text:span><text:span text:style-name="Emphasis"><text:span text:style-name="Strong_20_Emphasis"><text:span text:style-name="T38">Lysosomal cobalamin transporter ABCD4</text:span></text:span></text:span><text:span text:style-name="Emphasis"><text:span text:style-name="Strong_20_Emphasis"><text:span text:style-name="T37"> </text:span></text:span></text:span><text:span text:style-name="Emphasis"><text:span text:style-name="Strong_20_Emphasis"><text:span text:style-name="T38">en humano y ratón, múltiples proteínas del arroz, entre otras.</text:span></text:span></text:span></text:p>
      <text:p text:style-name="P5"><text:span text:style-name="Strong_20_Emphasis"><text:span text:style-name="T38"/></text:span></text:p>
      <text:p text:style-name="P6"><text:span text:style-name="Strong_20_Emphasis"><text:span text:style-name="T58">3</text:span></text:span><text:span text:style-name="Strong_20_Emphasis"><text:span text:style-name="T59">c)</text:span></text:span><text:span text:style-name="Strong_20_Emphasis"><text:span text:style-name="T39"> Los patrones antes del refinamiento son mas cortos, con muchos aminoácidos comodines, sin zonas como [xxx] y con mayores valores de fitness, lo que indica patrones mas conservados y específicos. También, en los patrones devueltos, </text:span></text:span><text:span text:style-name="Strong_20_Emphasis"><text:span text:style-name="T50">u</text:span></text:span><text:span text:style-name="Strong_20_Emphasis"><text:span text:style-name="T40">no de los patrones antes del refinamiento es muy similar al que hemos definido (L-x-Y-x-S-x-R-x-G-L-x(3)-V-x-G-x-V), y el de mayor fitness encaja con la sección del logo que va de la columna 95 hasta la 119. Luego del refinamiento, el patrón de mayor fitness que encaja con esa misma sección tiene muchos menos comodines.</text:span></text:span></text:p>
      <text:p text:style-name="P6"><text:span text:style-name="Strong_20_Emphasis"><text:span text:style-name="T40"/></text:span></text:p>
      <text:p text:style-name="P7"><text:span text:style-name="Strong_20_Emphasis"><text:span text:style-name="T60">3d, </text:span></text:span><text:span text:style-name="Strong_20_Emphasis"><text:span text:style-name="T61">3e</text:span></text:span><text:span text:style-name="Strong_20_Emphasis"><text:span text:style-name="T60">)</text:span></text:span><text:span text:style-name="Strong_20_Emphasis"><text:span text:style-name="T40"> Elegimos el patrón L-D-x-L-H-x(2)-L-x(3)-Y-x-G-M, </text:span></text:span><text:span text:style-name="Strong_20_Emphasis"><text:span text:style-name="T41">y si bien encontramos muchos hits de guanylate cyclase, no se hallan resultados de </text:span></text:span><text:span text:style-name="Strong_20_Emphasis"><text:span text:style-name="T42">Methyl-accepting chemotaxis protein.</text:span></text:span></text:p>
      <text:p text:style-name="P7"><text:span text:style-name="Strong_20_Emphasis"><text:span text:style-name="T40"/></text:span></text:p>
      <text:h text:style-name="P28" text:outline-level="2"><text:span text:style-name="Strong_20_Emphasis">Ejercicio 4 – </text:span><text:span text:style-name="Strong_20_Emphasis"><text:span text:style-name="T1">De humanos a bacterias y viceversa</text:span></text:span></text:h>
      <text:p text:style-name="P8"><text:span text:style-name="Strong_20_Emphasis"><text:span text:style-name="T42"/></text:span></text:p>
      <text:p text:style-name="P8"><text:span text:style-name="Strong_20_Emphasis"><text:span text:style-name="T62">4a)</text:span></text:span><text:span text:style-name="Strong_20_Emphasis"><text:span text:style-name="T42"> </text:span></text:span><text:span text:style-name="Strong_20_Emphasis"><text:span text:style-name="T43">BLAST: Realizamos blastp ingresando la secuencia de C. tetani, usando la base refSeq_select, añadiendo el organismo humano, usando BLOSUM45 y word size 3 para encontrar homologías lejanas. En los resultados no se halló la sGC. </text:span></text:span><text:span text:style-name="Strong_20_Emphasis"><text:span text:style-name="T44">Blast permite recuperar homólogos bacterianos cercanos, pero no es un método efectivo para recuperar fácilmente la sGC humana, ya que la identidad de la secuencia entre bacterias y mamíferos puede ser baja aunque la estructura y la función estén conservadas.</text:span></text:span></text:p>
      <text:p text:style-name="P8"><text:span text:style-name="Strong_20_Emphasis"><text:span text:style-name="T43"/></text:span></text:p>
      <text:p text:style-name="P9"><text:span text:style-name="Strong_20_Emphasis"><text:span text:style-name="T43">PSI-BLAST: </text:span></text:span><text:span text:style-name="Strong_20_Emphasis"><text:span text:style-name="T44">Esta herramienta construye un perfil evolutivo, detecta homología remota, y es más sensible que el blast común, por lo que podría funcionar. Sin embargo, h</text:span></text:span><text:span text:style-name="Strong_20_Emphasis"><text:span text:style-name="T45">icimos el mismo procedimiento, y luego de 4 iteraciones l</text:span></text:span><text:span text:style-name="Strong_20_Emphasis"><text:span text:style-name="T50">a</text:span></text:span><text:span text:style-name="Strong_20_Emphasis"><text:span text:style-name="T45"> sGC sigue sin aparecer.</text:span></text:span></text:p>
      <text:p text:style-name="P9"><text:span text:style-name="Strong_20_Emphasis"><text:span text:style-name="T45"/></text:span></text:p>
      <text:p text:style-name="P10"><text:span text:style-name="Strong_20_Emphasis"><text:span text:style-name="T46">PFAM: Hacemos una búsqueda por secuencia en </text:span></text:span><text:span text:style-name="Strong_20_Emphasis"><text:span text:style-name="T50">I</text:span></text:span><text:span text:style-name="Strong_20_Emphasis"><text:span text:style-name="T46">nterpro, luego en el resultado vamos a entries y filtramos por PFAM, seleccionamos HNOB y allí entramos a proteins y buscamos homo sapiens. Encontramos como resultado al guanilato ciclasa soluble subunidad beta-1.</text:span></text:span></text:p>
      <text:p text:style-name="P10"><text:span text:style-name="Strong_20_Emphasis"><text:span text:style-name="T46"/></text:span></text:p>
      <text:p text:style-name="P10"><text:span text:style-name="Strong_20_Emphasis"><text:span text:style-name="T46">PROSITE: Vamos a ScanProsite y seleccionamos la opción de escanear motivos, ingresamos el patrón definido en el ejercicio 3b y hallamos </text:span></text:span><text:span text:style-name="Strong_20_Emphasis"><text:span text:style-name="T47">nuevamente al guanilato ciclasa soluble subunidad beta-1.</text:span></text:span></text:p>
      <text:p text:style-name="P10"><text:span text:style-name="Strong_20_Emphasis"><text:span text:style-name="T47"/></text:span></text:p>
      <text:p text:style-name="P11"><text:span text:style-name="Strong_20_Emphasis"><text:span text:style-name="T47">Consideramos mas rápido el método BLAST, ya que consiste en ingresar la secuencia con 2 parámetros, aunque es poco sensible. El método mas sensible es PFAM, ya que nos permite ver todas las proteínas que pertenecen al dominio de HNOB y los dominios relacionados a este.</text:span></text:span></text:p>
      <text:p text:style-name="P11"><text:span text:style-name="Strong_20_Emphasis"><text:span text:style-name="T47">Entre los dos métodos exitosos, creemos que PFAM fue mejor en este caso, ya que para PROSITE se tiene que conseguir un patrón, el cual sacamos del logo de HNOB en PFAM, mientras que en PFAM se ingresó la secuencia, y en unos pasos cortos se llegó al resultado.</text:span></text:span></text:p>
      <text:p text:style-name="P11"><text:span text:style-name="Strong_20_Emphasis"><text:span text:style-name="T47"/></text:span></text:p>
      <text:p text:style-name="P11"><text:span text:style-name="Strong_20_Emphasis"><text:span text:style-name="T63">4b)</text:span></text:span><text:span text:style-name="Strong_20_Emphasis"><text:span text:style-name="T47"> </text:span></text:span><text:span text:style-name="Strong_20_Emphasis"><text:span text:style-name="T48">La proteína sGC se une a oxido nítrico para catalizar la reacción que convierte GMP a GMPc. GMPc es una molécula que actúa como segundo mensajero, participa en la transmisión de señales dentro de la célula. Cuando sGC esta activa, la concentración de GMPc aumenta considerablemente dentro de la célula., lo que provoca que el GMPc active mediante señales distintas proteínas específicas. En humanos, al parecer estos efectos producen relajación muscular y vaso dilatación. </text:span></text:span><text:soft-page-break/><text:span text:style-name="Strong_20_Emphasis"><text:span text:style-name="T48">En bacterias es diferente, las señalizaciones del GMPc pueden provocar efectos como modificar el comportamiento celular, entre otros distintos efectos.</text:span></text:span></text:p>
      <text:p text:style-name="P6"><text:span text:style-name="Strong_20_Emphasis"><text:span text:style-name="T40"/></text:span></text:p>
      <text:p text:style-name="P12"><text:span text:style-name="Strong_20_Emphasis"><text:span text:style-name="T48">Experimentos que podríamos proponer para estudiar al sGC podrían ser del tipo de mutagénesis dirigida sobre los genes implicados. </text:span></text:span><text:span text:style-name="Strong_20_Emphasis"><text:span text:style-name="T50">Consiste en</text:span></text:span><text:span text:style-name="Strong_20_Emphasis"><text:span text:style-name="T48"> generar los aminoácidos implicados en la unión al hemo, por ejemplo la histidina conservada, luego comparar </text:span></text:span><text:span text:style-name="Strong_20_Emphasis"><text:span text:style-name="T49">la actividad de estas bacterias mutadas con bacterias control en presencia y ausencia de oxido nitrico. De esta manera evaluamos niveles intracelulares de GMPc, cambios en el comportamiento (movilidad/quimiotaxis), o expresión de genes regulados por oxido nítrico. Si la proteína realmente funciona como un sensor de NO, esperamos que la silvestre responda al NO aumentando los niveles de GMPc y la mutante pierda total o parcialmente esta respuest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1:16:05.066998694</meta:creation-date>
    <dc:date>2026-05-15T17:15:37.703882891</dc:date>
    <meta:editing-duration>PT43M38S</meta:editing-duration>
    <meta:editing-cycles>5</meta:editing-cycles>
    <meta:generator>LibreOffice/24.2.7.2$Linux_X86_64 LibreOffice_project/420$Build-2</meta:generator>
    <meta:document-statistic meta:table-count="0" meta:image-count="0" meta:object-count="0" meta:page-count="4" meta:paragraph-count="37" meta:word-count="1529" meta:character-count="9685" meta:non-whitespace-character-count="8189"/>
  </office:meta>
</office:document-meta>
</file>