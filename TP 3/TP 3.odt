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officeooo:rsid="0003d246" officeooo:paragraph-rsid="0003d246"/>
    </style:style>
    <style:style style:name="P2" style:family="paragraph" style:parent-style-name="Standard">
      <style:text-properties officeooo:rsid="00072552" officeooo:paragraph-rsid="00072552"/>
    </style:style>
    <style:style style:name="P3" style:family="paragraph" style:parent-style-name="Standard">
      <style:text-properties fo:color="#bf0041" loext:opacity="100%" officeooo:rsid="00072552" officeooo:paragraph-rsid="00072552"/>
    </style:style>
    <style:style style:name="P4" style:family="paragraph" style:parent-style-name="Standard">
      <style:text-properties fo:color="#bf0041" loext:opacity="100%" officeooo:rsid="0003d246" officeooo:paragraph-rsid="0003d246"/>
    </style:style>
    <style:style style:name="P5" style:family="paragraph" style:parent-style-name="Standard">
      <style:text-properties officeooo:paragraph-rsid="00072552"/>
    </style:style>
    <style:style style:name="P6" style:family="paragraph" style:parent-style-name="Standard">
      <style:text-properties fo:color="#800080" loext:opacity="100%" officeooo:rsid="000baca9" officeooo:paragraph-rsid="000baca9"/>
    </style:style>
    <style:style style:name="P7" style:family="paragraph" style:parent-style-name="Standard">
      <style:text-properties fo:color="#800080" loext:opacity="100%" officeooo:rsid="000baf2b" officeooo:paragraph-rsid="000baf2b"/>
    </style:style>
    <style:style style:name="P8" style:family="paragraph" style:parent-style-name="Standard">
      <style:text-properties style:use-window-font-color="true" loext:opacity="0%" officeooo:rsid="0016fe5e" officeooo:paragraph-rsid="0016fe5e"/>
    </style:style>
    <style:style style:name="P9" style:family="paragraph" style:parent-style-name="Standard">
      <style:text-properties style:use-window-font-color="true" loext:opacity="0%" officeooo:rsid="0018d96c" officeooo:paragraph-rsid="0018d96c"/>
    </style:style>
    <style:style style:name="P10" style:family="paragraph" style:parent-style-name="Standard">
      <style:text-properties style:use-window-font-color="true" loext:opacity="0%" officeooo:rsid="00199674" officeooo:paragraph-rsid="00199674"/>
    </style:style>
    <style:style style:name="P11" style:family="paragraph" style:parent-style-name="Standard">
      <style:text-properties officeooo:rsid="000baf2b" officeooo:paragraph-rsid="000baf2b"/>
    </style:style>
    <style:style style:name="P12" style:family="paragraph" style:parent-style-name="Standard">
      <style:text-properties officeooo:rsid="000cb440" officeooo:paragraph-rsid="000cb440"/>
    </style:style>
    <style:style style:name="P13" style:family="paragraph" style:parent-style-name="Standard">
      <style:text-properties officeooo:rsid="000dc2c3" officeooo:paragraph-rsid="000dc2c3"/>
    </style:style>
    <style:style style:name="P14" style:family="paragraph" style:parent-style-name="Standard">
      <style:text-properties officeooo:rsid="00148b2f" officeooo:paragraph-rsid="00148b2f"/>
    </style:style>
    <style:style style:name="P15" style:family="paragraph" style:parent-style-name="Standard">
      <style:text-properties officeooo:rsid="0015243f" officeooo:paragraph-rsid="0015243f"/>
    </style:style>
    <style:style style:name="P16" style:family="paragraph" style:parent-style-name="Standard">
      <style:text-properties officeooo:paragraph-rsid="0019c75e"/>
    </style:style>
    <style:style style:name="P17" style:family="paragraph" style:parent-style-name="Standard">
      <style:text-properties officeooo:paragraph-rsid="001c26b4"/>
    </style:style>
    <style:style style:name="P18" style:family="paragraph" style:parent-style-name="Standard">
      <style:text-properties officeooo:paragraph-rsid="001de21b"/>
    </style:style>
    <style:style style:name="P19" style:family="paragraph" style:parent-style-name="Standard">
      <style:text-properties officeooo:paragraph-rsid="001e73b0"/>
    </style:style>
    <style:style style:name="P20" style:family="paragraph" style:parent-style-name="Standard">
      <style:text-properties officeooo:paragraph-rsid="0020bdd8"/>
    </style:style>
    <style:style style:name="P21" style:family="paragraph" style:parent-style-name="Standard">
      <style:text-properties officeooo:paragraph-rsid="00222353"/>
    </style:style>
    <style:style style:name="P22" style:family="paragraph" style:parent-style-name="Standard">
      <style:text-properties officeooo:paragraph-rsid="00233d15"/>
    </style:style>
    <style:style style:name="P23" style:family="paragraph" style:parent-style-name="Standard">
      <style:text-properties officeooo:paragraph-rsid="00252ce6"/>
    </style:style>
    <style:style style:name="T1" style:family="text">
      <style:text-properties officeooo:rsid="0004cf84"/>
    </style:style>
    <style:style style:name="T2" style:family="text">
      <style:text-properties officeooo:rsid="000674f7"/>
    </style:style>
    <style:style style:name="T3" style:family="text">
      <style:text-properties officeooo:rsid="0007e43b"/>
    </style:style>
    <style:style style:name="T4" style:family="text">
      <style:text-properties officeooo:rsid="00090783"/>
    </style:style>
    <style:style style:name="T5" style:family="text">
      <style:text-properties officeooo:rsid="0009c4e9"/>
    </style:style>
    <style:style style:name="T6" style:family="text">
      <style:text-properties fo:color="#800080" loext:opacity="100%"/>
    </style:style>
    <style:style style:name="T7" style:family="text">
      <style:text-properties fo:color="#800080" loext:opacity="100%" officeooo:rsid="00072552"/>
    </style:style>
    <style:style style:name="T8" style:family="text">
      <style:text-properties officeooo:rsid="000baca9"/>
    </style:style>
    <style:style style:name="T9" style:family="text">
      <style:text-properties officeooo:rsid="00072552"/>
    </style:style>
    <style:style style:name="T10" style:family="text">
      <style:text-properties style:use-window-font-color="true" loext:opacity="0%"/>
    </style:style>
    <style:style style:name="T11" style:family="text">
      <style:text-properties style:use-window-font-color="true" loext:opacity="0%" officeooo:rsid="000baf2b"/>
    </style:style>
    <style:style style:name="T12" style:family="text">
      <style:text-properties style:use-window-font-color="true" loext:opacity="0%" officeooo:rsid="000cb440"/>
    </style:style>
    <style:style style:name="T13" style:family="text">
      <style:text-properties style:use-window-font-color="true" loext:opacity="0%" officeooo:rsid="000dc2c3"/>
    </style:style>
    <style:style style:name="T14" style:family="text">
      <style:text-properties style:use-window-font-color="true" loext:opacity="0%" officeooo:rsid="0019c75e"/>
    </style:style>
    <style:style style:name="T15" style:family="text">
      <style:text-properties officeooo:rsid="000baf2b"/>
    </style:style>
    <style:style style:name="T16" style:family="text">
      <style:text-properties officeooo:rsid="000dc2c3"/>
    </style:style>
    <style:style style:name="T17" style:family="text">
      <style:text-properties officeooo:rsid="000e905d"/>
    </style:style>
    <style:style style:name="T18" style:family="text">
      <style:text-properties officeooo:rsid="0010641e"/>
    </style:style>
    <style:style style:name="T19" style:family="text">
      <style:text-properties officeooo:rsid="0011f782"/>
    </style:style>
    <style:style style:name="T20" style:family="text">
      <style:text-properties officeooo:rsid="0013f576"/>
    </style:style>
    <style:style style:name="T21" style:family="text">
      <style:text-properties officeooo:rsid="00148b2f"/>
    </style:style>
    <style:style style:name="T22" style:family="text">
      <style:text-properties officeooo:rsid="0016fe5e"/>
    </style:style>
    <style:style style:name="T23" style:family="text">
      <style:text-properties fo:color="#f10d0c" loext:opacity="100%" officeooo:rsid="0016fe5e"/>
    </style:style>
    <style:style style:name="T24" style:family="text">
      <style:text-properties officeooo:rsid="00178e05"/>
    </style:style>
    <style:style style:name="T25" style:family="text">
      <style:text-properties officeooo:rsid="00199674"/>
    </style:style>
    <style:style style:name="T26" style:family="text">
      <style:text-properties officeooo:rsid="0019c75e"/>
    </style:style>
    <style:style style:name="T27" style:family="text">
      <style:text-properties officeooo:rsid="001a2e18"/>
    </style:style>
    <style:style style:name="T28" style:family="text">
      <style:text-properties officeooo:rsid="001c26b4"/>
    </style:style>
    <style:style style:name="T29" style:family="text">
      <style:text-properties officeooo:rsid="001c42b8"/>
    </style:style>
    <style:style style:name="T30" style:family="text">
      <style:text-properties fo:font-style="normal" officeooo:rsid="001c42b8" style:font-style-asian="normal" style:font-style-complex="normal"/>
    </style:style>
    <style:style style:name="T31" style:family="text">
      <style:text-properties fo:font-style="normal" fo:font-weight="normal" officeooo:rsid="001c42b8" style:font-style-asian="normal" style:font-weight-asian="normal" style:font-style-complex="normal" style:font-weight-complex="normal"/>
    </style:style>
    <style:style style:name="T32" style:family="text">
      <style:text-properties fo:font-style="normal" fo:font-weight="normal" officeooo:rsid="001de21b" style:font-style-asian="normal" style:font-weight-asian="normal" style:font-style-complex="normal" style:font-weight-complex="normal"/>
    </style:style>
    <style:style style:name="T33" style:family="text">
      <style:text-properties fo:font-style="normal" fo:font-weight="normal" officeooo:rsid="001e73b0" style:font-style-asian="normal" style:font-weight-asian="normal" style:font-style-complex="normal" style:font-weight-complex="normal"/>
    </style:style>
    <style:style style:name="T34" style:family="text">
      <style:text-properties fo:font-style="normal" fo:font-weight="normal" officeooo:rsid="001f5c0d" style:font-style-asian="normal" style:font-weight-asian="normal" style:font-style-complex="normal" style:font-weight-complex="normal"/>
    </style:style>
    <style:style style:name="T35" style:family="text">
      <style:text-properties fo:font-style="normal" fo:font-weight="normal" officeooo:rsid="0020bdd8" style:font-style-asian="normal" style:font-weight-asian="normal" style:font-style-complex="normal" style:font-weight-complex="normal"/>
    </style:style>
    <style:style style:name="T36" style:family="text">
      <style:text-properties fo:font-style="normal" fo:font-weight="normal" officeooo:rsid="00222353" style:font-style-asian="normal" style:font-weight-asian="normal" style:font-style-complex="normal" style:font-weight-complex="normal"/>
    </style:style>
    <style:style style:name="T37" style:family="text">
      <style:text-properties fo:font-style="normal" fo:font-weight="normal" officeooo:rsid="0022df03" style:font-style-asian="normal" style:font-weight-asian="normal" style:font-style-complex="normal" style:font-weight-complex="normal"/>
    </style:style>
    <style:style style:name="T38" style:family="text">
      <style:text-properties fo:font-style="normal" fo:font-weight="normal" officeooo:rsid="00233d15" style:font-style-asian="normal" style:font-weight-asian="normal" style:font-style-complex="normal" style:font-weight-complex="normal"/>
    </style:style>
    <style:style style:name="T39" style:family="text">
      <style:text-properties fo:font-style="normal" fo:font-weight="normal" officeooo:rsid="00252ce6" style:font-style-asian="normal" style:font-weight-asian="normal" style:font-style-complex="normal" style:font-weight-complex="normal"/>
    </style:style>
    <style:style style:name="T40" style:family="text">
      <style:text-properties officeooo:rsid="001de21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Ejercicio 1</text:p>
      <text:p text:style-name="P1"/>
      <text:p text:style-name="P1"><text:span text:style-name="T6">1a)</text:span> <text:span text:style-name="T3">Como estoy buscando mas proteínas, voy a utilizar blastp, y utilizo la base de datos refseq_select ya que tiene datos no redundantes e ignora las isoformes.</text:span> <text:span text:style-name="T3">O</text:span>bservamos que la gran mayoría de los hits son proteínas hem<text:span text:style-name="T3">e</text:span> NO-binding domain-containing, <text:span text:style-name="T3">que es la proteína query pero en otras especies de clostridium. </text:span><text:span text:style-name="T4">También aparece en otras especies similiares. Su grupo prostético es hemo, unen la molécula de óxido nítrico y su función es la misma que la descripta en el TP.</text:span></text:p>
      <text:p text:style-name="P1"/>
      <text:p text:style-name="P1"><text:span text:style-name="T6">2a)</text:span> Las de C. tetani están muy poco conservadas, ya que no alcanzan el 40% de identidad y la cobertura es menor al 50%. <text:span text:style-name="T5">Aparecen proteínas homólogas en miembros de la familia Haloimpatiens, Inconstantimicrobium mannanitabidum, Desnuesiella massiliensis, Vallitalea okinawensis y otros, ya que tienen una identidad entre 60 y 50%, con una cobertura de 97% y un e-value de 0.</text:span></text:p>
      <text:p text:style-name="P1"/>
      <text:p text:style-name="P1"><text:span text:style-name="T6">1b)</text:span> <text:span text:style-name="T1">Presenta 2 dominios, las HNOB (heme NO-binding) y las Tar. El primero proviene de </text:span><text:span text:style-name="T2">PFAM del NCBI</text:span><text:span text:style-name="T1"> y funciona como un sensor dependiente de hemo para ligandos gaseosos y que transduce diversas señales en bacterias y animales. El segundo proviene de </text:span><text:span text:style-name="T2">la base de datos COG del NCBI</text:span><text:span text:style-name="T1"> y su función es ser un sensor ambiental, detectando sustancias químicas en el entorno para enviar una señal al interior de la bacteria para moverse hacia ellas.</text:span></text:p>
      <text:p text:style-name="P1"/>
      <text:p text:style-name="P3">Ejercicio 2</text:p>
      <text:p text:style-name="P2"/>
      <text:p text:style-name="P5"><text:span text:style-name="T7">2a)</text:span><text:span text:style-name="T9"> </text:span><text:span text:style-name="T8">Aparecen dominios como heme NO-binding de nuevo y MCP en PFAM, H-NOX en CTAH-Gene 3D y </text:span>NO signalling/Golgi transport ligand-binding <text:span text:style-name="T8">en SUPERFAMILY.</text:span></text:p>
      <text:p text:style-name="P5"/>
      <text:p text:style-name="P6">2b)<text:span text:style-name="T10"> </text:span><text:span text:style-name="T11">Esperamos que se conserve la histidína para que actúe como ligando del hemo.</text:span></text:p>
      <text:p text:style-name="P6"><text:span text:style-name="T11"/></text:p>
      <text:p text:style-name="P7">2c) <text:span text:style-name="T10">Efectivamente, se puede observar que las histidina se encuentra alineada en todas las secuencias </text:span><text:span text:style-name="T13">de la columna 137</text:span><text:span text:style-name="T12">.</text:span></text:p>
      <text:p text:style-name="P11"/>
      <text:p text:style-name="P12">2d) S<text:span text:style-name="T15">e conservan bastante la </text:span>arginina <text:span text:style-name="T16">en la columna 175</text:span><text:span text:style-name="T15">, la glicina </text:span><text:span text:style-name="T17">en la 2</text:span><text:span text:style-name="T15"> y la prolina </text:span><text:span text:style-name="T16">en la 154</text:span><text:span text:style-name="T15">. </text:span>Se conservan ligeramente <text:span text:style-name="T17">el aspartato en la 138</text:span> y la <text:span text:style-name="T17">glicina en la 115</text:span>. <text:span text:style-name="T16">Hay una inserción alrededor de la columna 116, y otra en la 140.</text:span></text:p>
      <text:p text:style-name="P12"/>
      <text:p text:style-name="P13">2e) <text:span text:style-name="T18">Como el logo no toma en cuenta las inserciones por la cantidad de gaps, muchas de las columnas están en posiciones anteriores a las anotadas en el ítem anterior. L</text:span><text:span text:style-name="T19">as posiciones mas importantes son la 2 (glicina), 41 (tirosina, valina), 69 (glicina), 81 (tirosina, fenilalanina), 95 (fenilalanina, leucina), 103 (histidina), 116 (prolina), </text:span><text:span text:style-name="T20">132 (tirosina), 134 (serina), 136 (arginina, lisina), 145 (glicina), y 154 (fenilalanina, tirosina). En la columna 31 hay 44% de chance de inserción, </text:span><text:span text:style-name="T21">la 103 con una chance de 41% y 152 con 37%.</text:span></text:p>
      <text:p text:style-name="P13"/>
      <text:p text:style-name="P14">2f) La histidina conservada del ejercicio 2b está en la posición 103 según el logo.</text:p>
      <text:p text:style-name="P14"/>
      <text:p text:style-name="P15">2g) En el texto, se observa que la histidina en la posición 103 tiene una de las probabilidades mas bajas de ser emitida en un match, que es lo opuesto a lo que esperabamos. <text:span text:style-name="T22">La arginina conservada también es la de menor probabilidades, lo mismo pasa con la prolina y la glicina. </text:span><text:span text:style-name="T23">PREGUNTAR POR QUE</text:span></text:p>
      <text:p text:style-name="P15"><text:span text:style-name="T23"/></text:p>
      <text:p text:style-name="P8">2h) <text:span text:style-name="T24">Se puede combinar con MCPsignal, guanilato_cyc, HNOBA, PAS_9, PAS_4 , PDEase_I entre otras.</text:span></text:p>
      <text:p text:style-name="P8"/>
      <text:p text:style-name="P9"><text:soft-page-break/>2i) Hay 116 especies de Clostridium, y tiene 153 secuencias. Otras especies de Clostridium que tienen el dominio HNOB son Botulinum, Perfringens, Beijerinckii, Sporogenes y Kluyveri entre otros. </text:p>
      <text:p text:style-name="P9"/>
      <text:p text:style-name="P9">El dominio MCPsignal puede combinarse con otros dominios como HAMP, Tar3, 4HB_MCP­₁ y PAS_3. <text:span text:style-name="T25">Los aminoácidos conservados son la glutamina en la columna 48, asparagina en la volimna 50 y 55, arginina en la 62, glicina en 64, 67 y 69, fenilalanina en 70, glutamato en 76 y leucina en 80. Su función en transducir señales a ChoA (proteína quinasa) la cual es fundamental en la quimiotaxis bacteriana, por lo que se halla principalmente en bacterias.</text:span></text:p>
      <text:p text:style-name="P9"/>
      <text:p text:style-name="P10">Ejercicio 3</text:p>
      <text:p text:style-name="P10"/>
      <text:p text:style-name="P16"><text:span text:style-name="T14">3a) El signature que se halla es </text:span>R-T-E-[EQ]-Q-x(2)-[SA]-[LIVM]-x-[EQ]-T-A-A-S-M-E-Q-L-T-A-T-V, <text:span text:style-name="T26">por lo tanto es un patrón con expresiones regulares en bez de una matriz con probabilidades. </text:span><text:span text:style-name="T27">En el logo se puede observar que no hay ninguna histidina conservadam podemos descartar que pertenezca a HNOB, y como la descripción habla sobre transducción de señales químicas y methyl-accepting sites, concluimos que el dominio al que pertenece es MCPsignal.</text:span></text:p>
      <text:p text:style-name="P16"/>
      <text:p text:style-name="P17"><text:span text:style-name="T28">3b) Viendo el logo desde la columna 130, decidimos ingresar el patrón [LIM]-x-Y-x-S-x-R-x(2)-[LMF]. </text:span><text:span text:style-name="T29">Aparecen multiples proteínas del </text:span><text:span text:style-name="Emphasis">African swine fever virus, </text:span><text:span text:style-name="Emphasis"><text:span text:style-name="T30">la proteína </text:span></text:span><text:span text:style-name="Emphasis"><text:span text:style-name="Strong_20_Emphasis"><text:span text:style-name="T30">Lysosomal cobalamin transporter ABCD4 </text:span></text:span></text:span><text:span text:style-name="Emphasis"><text:span text:style-name="Strong_20_Emphasis"><text:span text:style-name="T31">en humano y ratón, multiples proteínas del arroz, entre otras.</text:span></text:span></text:span></text:p>
      <text:p text:style-name="P17"><text:span text:style-name="Strong_20_Emphasis"><text:span text:style-name="T31"/></text:span></text:p>
      <text:p text:style-name="P18"><text:span text:style-name="Strong_20_Emphasis"><text:span text:style-name="T40">3</text:span></text:span><text:span text:style-name="Strong_20_Emphasis"><text:span text:style-name="T32">c) Los patrones antes del refinamiento son mas cortos, con muchos aminoácidos comodines y sin zonas como [xxx] y con mayores valores de fitness (lo que indica patrones mas conservados y específicos. También, en los patrones devueltos <text:s/></text:span></text:span><text:span text:style-name="Strong_20_Emphasis"><text:span text:style-name="T33">Uno de los patrones antes del refinamiento es muy similar al que hemos definido (L-x-Y-x-S-x-R-x-G-L-x(3)-V-x-G-x-V), y el de mayor fitness encaja con la sección del logo que va de la columna 95 hasta la 119. Luego del refinamiento, el patrón de mayor fitness que encaja con esa misma sección tiene muchos menos comodines.</text:span></text:span></text:p>
      <text:p text:style-name="P18"><text:span text:style-name="Strong_20_Emphasis"><text:span text:style-name="T33"/></text:span></text:p>
      <text:p text:style-name="P19"><text:span text:style-name="Strong_20_Emphasis"><text:span text:style-name="T33">3d, </text:span></text:span><text:span text:style-name="Strong_20_Emphasis"><text:span text:style-name="T34">3e</text:span></text:span><text:span text:style-name="Strong_20_Emphasis"><text:span text:style-name="T33">) Elegimos el patrón L-D-x-L-H-x(2)-L-x(3)-Y-x-G-M, </text:span></text:span><text:span text:style-name="Strong_20_Emphasis"><text:span text:style-name="T34">y si bien encontramos muchos hits de guanylate cyclase, no se hallan resultados de </text:span></text:span><text:span text:style-name="Strong_20_Emphasis"><text:span text:style-name="T35">Methyl-accepting chemotaxis protein.</text:span></text:span></text:p>
      <text:p text:style-name="P19"><text:span text:style-name="Strong_20_Emphasis"><text:span text:style-name="T33"/></text:span></text:p>
      <text:p text:style-name="P20"><text:span text:style-name="Strong_20_Emphasis"><text:span text:style-name="T35">Ejercicio 4</text:span></text:span></text:p>
      <text:p text:style-name="P20"><text:span text:style-name="Strong_20_Emphasis"><text:span text:style-name="T35"/></text:span></text:p>
      <text:p text:style-name="P20"><text:span text:style-name="Strong_20_Emphasis"><text:span text:style-name="T35">4a) </text:span></text:span><text:span text:style-name="Strong_20_Emphasis"><text:span text:style-name="T36">BLAST: Realizamos blastp ingresando la secuencia de C. tetani, usando la base refSeq_select, añadiendo el organismo humano y usando BLOSUM45 y word size 3 para encontrar homologías lejanas. En los resultados no se halló la sGC.</text:span></text:span></text:p>
      <text:p text:style-name="P20"><text:span text:style-name="Strong_20_Emphasis"><text:span text:style-name="T36"/></text:span></text:p>
      <text:p text:style-name="P21"><text:span text:style-name="Strong_20_Emphasis"><text:span text:style-name="T36">PSI-BLAST: </text:span></text:span><text:span text:style-name="Strong_20_Emphasis"><text:span text:style-name="T37">Hicimos el mismo procedimiento, y luego de 4 iteraciones ls sGC sigue sin aparecer.</text:span></text:span></text:p>
      <text:p text:style-name="P21"><text:span text:style-name="Strong_20_Emphasis"><text:span text:style-name="T37"/></text:span></text:p>
      <text:p text:style-name="P22"><text:span text:style-name="Strong_20_Emphasis"><text:span text:style-name="T38">PFAM: Hacemos una busqueda por secuencia en interpro, luego en el resultado vamos a entries y filtramos por PFAM, seleccionamos HNOB y allí entramos a proteins y buscamos homo sapiens. Encontramos como resultado al guanilato ciclasa soluble subunidad beta-1.</text:span></text:span></text:p>
      <text:p text:style-name="P22"><text:span text:style-name="Strong_20_Emphasis"><text:span text:style-name="T38"/></text:span></text:p>
      <text:p text:style-name="P22"><text:span text:style-name="Strong_20_Emphasis"><text:span text:style-name="T38">PROSITE: Vamos a ScanProsite y seleccionamos la opcion de scaanear motivos, ingresamos el patrón definido en el ejercicio 3b y hallamos </text:span></text:span><text:span text:style-name="Strong_20_Emphasis"><text:span text:style-name="T39">nuevamente al guanilato ciclasa soluble subunidad beta-1.</text:span></text:span></text:p>
      <text:p text:style-name="P22"><text:span text:style-name="Strong_20_Emphasis"><text:span text:style-name="T39"/></text:span></text:p>
      <text:p text:style-name="P23"><text:span text:style-name="Strong_20_Emphasis"><text:span text:style-name="T39">Consideramos mas rapido el metodo BLAST, ya que consiste en ingresar la secuencia con 2 parametros, aunque es poco sensible. El método mas sensible es PFAM, ya que nos permite ver todas las proteínas que pertenecen al dominio de HNOB y los dominios relacionados a este.</text:span></text:span></text:p>
      <text:p text:style-name="P23"><text:soft-page-break/><text:span text:style-name="Strong_20_Emphasis"><text:span text:style-name="T39">Entre los dos métodos exitosos, creemos que PFAM fue mejor en este caso, ya que para PROSITE se tiene que conseguir un patrón, el cual sacamos del logo de HNOB en PFAM, mientras que en PFAM se ingresó la secuencia, y en unos pasos cortos se llegó al resultado.</text:span></text:span></text:p>
      <text:p text:style-name="P23"><text:span text:style-name="Strong_20_Emphasis"><text:span text:style-name="T39"/></text:span></text:p>
      <text:p text:style-name="P23"><text:span text:style-name="Strong_20_Emphasis"><text:span text:style-name="T39">4b) AAAAAAAAAAAAAAAAAAAAAAAAAAAAAAAAAAAAAAAAAA.</text:span></text:span></text:p>
      <text:p text:style-name="P18"><text:span text:style-name="Strong_20_Emphasis"><text:span text:style-name="T3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07T11:16:05.066998694</meta:creation-date>
    <dc:date>2026-05-11T02:50:22.956340723</dc:date>
    <meta:editing-duration>PT20M5S</meta:editing-duration>
    <meta:editing-cycles>3</meta:editing-cycles>
    <meta:generator>LibreOffice/24.2.7.2$Linux_X86_64 LibreOffice_project/420$Build-2</meta:generator>
    <meta:document-statistic meta:table-count="0" meta:image-count="0" meta:object-count="0" meta:page-count="3" meta:paragraph-count="28" meta:word-count="1035" meta:character-count="6378" meta:non-whitespace-character-count="5371"/>
  </office:meta>
</office:document-meta>
</file>