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246" officeooo:paragraph-rsid="0003d246"/>
    </style:style>
    <style:style style:name="P2" style:family="paragraph" style:parent-style-name="Standard">
      <style:text-properties officeooo:rsid="00072552" officeooo:paragraph-rsid="00072552"/>
    </style:style>
    <style:style style:name="P3" style:family="paragraph" style:parent-style-name="Standard">
      <style:text-properties fo:color="#bf0041" loext:opacity="100%" officeooo:rsid="00072552" officeooo:paragraph-rsid="00072552"/>
    </style:style>
    <style:style style:name="P4" style:family="paragraph" style:parent-style-name="Standard">
      <style:text-properties fo:color="#bf0041" loext:opacity="100%" officeooo:rsid="0003d246" officeooo:paragraph-rsid="0003d246"/>
    </style:style>
    <style:style style:name="P5" style:family="paragraph" style:parent-style-name="Standard">
      <style:text-properties officeooo:paragraph-rsid="00072552"/>
    </style:style>
    <style:style style:name="P6" style:family="paragraph" style:parent-style-name="Standard">
      <style:text-properties fo:color="#800080" loext:opacity="100%" officeooo:rsid="000baca9" officeooo:paragraph-rsid="000baca9"/>
    </style:style>
    <style:style style:name="P7" style:family="paragraph" style:parent-style-name="Standard">
      <style:text-properties fo:color="#800080" loext:opacity="100%" officeooo:rsid="000baf2b" officeooo:paragraph-rsid="000baf2b"/>
    </style:style>
    <style:style style:name="P8" style:family="paragraph" style:parent-style-name="Standard">
      <style:text-properties style:use-window-font-color="true" loext:opacity="0%" officeooo:rsid="0016fe5e" officeooo:paragraph-rsid="0016fe5e"/>
    </style:style>
    <style:style style:name="P9" style:family="paragraph" style:parent-style-name="Standard">
      <style:text-properties style:use-window-font-color="true" loext:opacity="0%" officeooo:rsid="0018d96c" officeooo:paragraph-rsid="0018d96c"/>
    </style:style>
    <style:style style:name="P10" style:family="paragraph" style:parent-style-name="Standard">
      <style:text-properties style:use-window-font-color="true" loext:opacity="0%" officeooo:rsid="00199674" officeooo:paragraph-rsid="00199674"/>
    </style:style>
    <style:style style:name="P11" style:family="paragraph" style:parent-style-name="Standard">
      <style:text-properties officeooo:rsid="000baf2b" officeooo:paragraph-rsid="000baf2b"/>
    </style:style>
    <style:style style:name="P12" style:family="paragraph" style:parent-style-name="Standard">
      <style:text-properties officeooo:rsid="000cb440" officeooo:paragraph-rsid="000cb440"/>
    </style:style>
    <style:style style:name="P13" style:family="paragraph" style:parent-style-name="Standard">
      <style:text-properties officeooo:rsid="000dc2c3" officeooo:paragraph-rsid="000dc2c3"/>
    </style:style>
    <style:style style:name="P14" style:family="paragraph" style:parent-style-name="Standard">
      <style:text-properties officeooo:rsid="00148b2f" officeooo:paragraph-rsid="00148b2f"/>
    </style:style>
    <style:style style:name="P15" style:family="paragraph" style:parent-style-name="Standard">
      <style:text-properties officeooo:rsid="0015243f" officeooo:paragraph-rsid="0015243f"/>
    </style:style>
    <style:style style:name="P16" style:family="paragraph" style:parent-style-name="Standard">
      <style:text-properties officeooo:paragraph-rsid="0019c75e"/>
    </style:style>
    <style:style style:name="T1" style:family="text">
      <style:text-properties officeooo:rsid="0004cf84"/>
    </style:style>
    <style:style style:name="T2" style:family="text">
      <style:text-properties officeooo:rsid="000674f7"/>
    </style:style>
    <style:style style:name="T3" style:family="text">
      <style:text-properties officeooo:rsid="0007e43b"/>
    </style:style>
    <style:style style:name="T4" style:family="text">
      <style:text-properties officeooo:rsid="00090783"/>
    </style:style>
    <style:style style:name="T5" style:family="text">
      <style:text-properties officeooo:rsid="0009c4e9"/>
    </style:style>
    <style:style style:name="T6" style:family="text">
      <style:text-properties fo:color="#800080" loext:opacity="100%"/>
    </style:style>
    <style:style style:name="T7" style:family="text">
      <style:text-properties fo:color="#800080" loext:opacity="100%" officeooo:rsid="00072552"/>
    </style:style>
    <style:style style:name="T8" style:family="text">
      <style:text-properties officeooo:rsid="000baca9"/>
    </style:style>
    <style:style style:name="T9" style:family="text">
      <style:text-properties officeooo:rsid="00072552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officeooo:rsid="000baf2b"/>
    </style:style>
    <style:style style:name="T12" style:family="text">
      <style:text-properties style:use-window-font-color="true" loext:opacity="0%" officeooo:rsid="000cb440"/>
    </style:style>
    <style:style style:name="T13" style:family="text">
      <style:text-properties style:use-window-font-color="true" loext:opacity="0%" officeooo:rsid="000dc2c3"/>
    </style:style>
    <style:style style:name="T14" style:family="text">
      <style:text-properties style:use-window-font-color="true" loext:opacity="0%" officeooo:rsid="0019c75e"/>
    </style:style>
    <style:style style:name="T15" style:family="text">
      <style:text-properties officeooo:rsid="000baf2b"/>
    </style:style>
    <style:style style:name="T16" style:family="text">
      <style:text-properties officeooo:rsid="000dc2c3"/>
    </style:style>
    <style:style style:name="T17" style:family="text">
      <style:text-properties officeooo:rsid="000e905d"/>
    </style:style>
    <style:style style:name="T18" style:family="text">
      <style:text-properties officeooo:rsid="0010641e"/>
    </style:style>
    <style:style style:name="T19" style:family="text">
      <style:text-properties officeooo:rsid="0011f782"/>
    </style:style>
    <style:style style:name="T20" style:family="text">
      <style:text-properties officeooo:rsid="0013f576"/>
    </style:style>
    <style:style style:name="T21" style:family="text">
      <style:text-properties officeooo:rsid="00148b2f"/>
    </style:style>
    <style:style style:name="T22" style:family="text">
      <style:text-properties officeooo:rsid="0016fe5e"/>
    </style:style>
    <style:style style:name="T23" style:family="text">
      <style:text-properties fo:color="#f10d0c" loext:opacity="100%" officeooo:rsid="0016fe5e"/>
    </style:style>
    <style:style style:name="T24" style:family="text">
      <style:text-properties officeooo:rsid="00178e05"/>
    </style:style>
    <style:style style:name="T25" style:family="text">
      <style:text-properties officeooo:rsid="00199674"/>
    </style:style>
    <style:style style:name="T26" style:family="text">
      <style:text-properties officeooo:rsid="0019c75e"/>
    </style:style>
    <style:style style:name="T27" style:family="text">
      <style:text-properties officeooo:rsid="001a2e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 1</text:p>
      <text:p text:style-name="P1"/>
      <text:p text:style-name="P1"><text:span text:style-name="T6">1a)</text:span> <text:span text:style-name="T3">Como estoy buscando mas proteínas, voy a utilizar blastp, y utilizo la base de datos refseq_select ya que tiene datos no redundantes e ignora las isoformes.</text:span> <text:span text:style-name="T3">O</text:span>bservamos que la gran mayoría de los hits son proteínas hem<text:span text:style-name="T3">e</text:span> NO-binding domain-containing, <text:span text:style-name="T3">que es la proteína query pero en otras especies de clostridium. </text:span><text:span text:style-name="T4">También aparece en otras especies similiares. Su grupo prostético es hemo, unen la molécula de óxido nítrico y su función es la misma que la descripta en el TP.</text:span></text:p>
      <text:p text:style-name="P1"/>
      <text:p text:style-name="P1"><text:span text:style-name="T6">2a)</text:span> Las de C. tetani están muy poco conservadas, ya que no alcanzan el 40% de identidad y la cobertura es menor al 50%. <text:span text:style-name="T5">Aparecen proteínas homólogas en miembros de la familia Haloimpatiens, Inconstantimicrobium mannanitabidum, Desnuesiella massiliensis, Vallitalea okinawensis y otros, ya que tienen una identidad entre 60 y 50%, con una cobertura de 97% y un e-value de 0.</text:span></text:p>
      <text:p text:style-name="P1"/>
      <text:p text:style-name="P1"><text:span text:style-name="T6">1b)</text:span> <text:span text:style-name="T1">Presenta 2 dominios, las HNOB (heme NO-binding) y las Tar. El primero proviene de </text:span><text:span text:style-name="T2">PFAM del NCBI</text:span><text:span text:style-name="T1"> y funciona como un sensor dependiente de hemo para ligandos gaseosos y que transduce diversas señales en bacterias y animales. El segundo proviene de </text:span><text:span text:style-name="T2">la base de datos COG del NCBI</text:span><text:span text:style-name="T1"> y su función es ser un sensor ambiental, detectando sustancias químicas en el entorno para enviar una señal al interior de la bacteria para moverse hacia ellas.</text:span></text:p>
      <text:p text:style-name="P1"/>
      <text:p text:style-name="P3">Ejercicio 2</text:p>
      <text:p text:style-name="P2"/>
      <text:p text:style-name="P5"><text:span text:style-name="T7">2a)</text:span><text:span text:style-name="T9"> </text:span><text:span text:style-name="T8">Aparecen dominios como heme NO-binding de nuevo y MCP en PFAM, H-NOX en CTAH-Gene 3D y </text:span>NO signalling/Golgi transport ligand-binding <text:span text:style-name="T8">en SUPERFAMILY.</text:span></text:p>
      <text:p text:style-name="P5"/>
      <text:p text:style-name="P6">2b)<text:span text:style-name="T10"> </text:span><text:span text:style-name="T11">Esperamos que se conserve la histidína para que actúe como ligando del hemo.</text:span></text:p>
      <text:p text:style-name="P6"><text:span text:style-name="T11"/></text:p>
      <text:p text:style-name="P7">2c) <text:span text:style-name="T10">Efectivamente, se puede observar que las histidina se encuentra alineada en todas las secuencias </text:span><text:span text:style-name="T13">de la columna 137</text:span><text:span text:style-name="T12">.</text:span></text:p>
      <text:p text:style-name="P11"/>
      <text:p text:style-name="P12">2d) S<text:span text:style-name="T15">e conservan bastante la </text:span>arginina <text:span text:style-name="T16">en la columna 175</text:span><text:span text:style-name="T15">, la glicina </text:span><text:span text:style-name="T17">en la 2</text:span><text:span text:style-name="T15"> y la prolina </text:span><text:span text:style-name="T16">en la 154</text:span><text:span text:style-name="T15">. </text:span>Se conservan ligeramente <text:span text:style-name="T17">el aspartato en la 138</text:span> y la <text:span text:style-name="T17">glicina en la 115</text:span>. <text:span text:style-name="T16">Hay una inserción alrededor de la columna 116, y otra en la 140.</text:span></text:p>
      <text:p text:style-name="P12"/>
      <text:p text:style-name="P13">2e) <text:span text:style-name="T18">Como el logo no toma en cuenta las inserciones por la cantidad de gaps, muchas de las columnas están en posiciones anteriores a las anotadas en el ítem anterior. L</text:span><text:span text:style-name="T19">as posiciones mas importantes son la 2 (glicina), 41 (tirosina, valina), 69 (glicina), 81 (tirosina, fenilalanina), 95 (fenilalanina, leucina), 103 (histidina), 116 (prolina), </text:span><text:span text:style-name="T20">132 (tirosina), 134 (serina), 136 (arginina, lisina), 145 (glicina), y 154 (fenilalanina, tirosina). En la columna 31 hay 44% de chance de inserción, </text:span><text:span text:style-name="T21">la 103 con una chance de 41% y 152 con 37%.</text:span></text:p>
      <text:p text:style-name="P13"/>
      <text:p text:style-name="P14">2f) La histidina conservada del ejercicio 2b está en la posición 103 según el logo.</text:p>
      <text:p text:style-name="P14"/>
      <text:p text:style-name="P15">2g) En el texto, se observa que la histidina en la posición 103 tiene una de las probabilidades mas bajas de ser emitida en un match, que es lo opuesto a lo que esperabamos. <text:span text:style-name="T22">La arginina conservada también es la de menor probabilidades, lo mismo pasa con la prolina y la glicina. </text:span><text:span text:style-name="T23">PREGUNTAR POR QUE</text:span></text:p>
      <text:p text:style-name="P15"><text:span text:style-name="T23"/></text:p>
      <text:p text:style-name="P8">2h) <text:span text:style-name="T24">Se puede combinar con MCPsignal, guanilato_cyc, HNOBA, PAS_9, PAS_4 , PDEase_I entre otras.</text:span></text:p>
      <text:p text:style-name="P8"/>
      <text:p text:style-name="P9"><text:soft-page-break/>2i) Hay 116 especies de Clostridium, y tiene 153 secuencias. Otras especies de Clostridium que tienen el dominio HNOB son Botulinum, Perfringens, Beijerinckii, Sporogenes y Kluyveri entre otros. </text:p>
      <text:p text:style-name="P9"/>
      <text:p text:style-name="P9">El dominio MCPsignal puede combinarse con otros dominios como HAMP, Tar3, 4HB_MCP­₁ y PAS_3. <text:span text:style-name="T25">Los aminoácidos conservados son la glutamina en la columna 48, asparagina en la volimna 50 y 55, arginina en la 62, glicina en 64, 67 y 69, fenilalanina en 70, glutamato en 76 y leucina en 80. Su función en transducir señales a ChoA (proteína quinasa) la cual es fundamental en la quimiotaxis bacteriana, por lo que se halla principalmente en bacterias.</text:span></text:p>
      <text:p text:style-name="P9"/>
      <text:p text:style-name="P10">Ejercicio 3</text:p>
      <text:p text:style-name="P10"/>
      <text:p text:style-name="P16"><text:span text:style-name="T14">3a) El signature que se halla es </text:span>R-T-E-[EQ]-Q-x(2)-[SA]-[LIVM]-x-[EQ]-T-A-A-S-M-E-Q-L-T-A-T-V, <text:span text:style-name="T26">por lo tanto es un patrón con expresiones regulares en bez de una matriz con probabilidades. </text:span><text:span text:style-name="T27">En el logo se puede observar que no hay ninguna histidina conservadam podemos descartar que pertenezca a HNOB, y como la descripción habla sobre transducción de señales químicas y methyl-accepting sites, concluimos que el dominio al que pertenece es MCPsigna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7T11:16:05.066998694</meta:creation-date>
    <dc:date>2026-05-08T01:02:06.958430356</dc:date>
    <meta:editing-duration>PT12M3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17" meta:word-count="667" meta:character-count="4008" meta:non-whitespace-character-count="3359"/>
  </office:meta>
</office:document-meta>
</file>