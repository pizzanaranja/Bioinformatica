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246" officeooo:paragraph-rsid="0003d246"/>
    </style:style>
    <style:style style:name="P2" style:family="paragraph" style:parent-style-name="Standard">
      <style:text-properties officeooo:rsid="00072552" officeooo:paragraph-rsid="00072552"/>
    </style:style>
    <style:style style:name="T1" style:family="text">
      <style:text-properties officeooo:rsid="0004cf84"/>
    </style:style>
    <style:style style:name="T2" style:family="text">
      <style:text-properties officeooo:rsid="000674f7"/>
    </style:style>
    <style:style style:name="T3" style:family="text">
      <style:text-properties officeooo:rsid="0007b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1a) Al hacer blastp (porque uso una proteína y busco otras), en la base de datos refseq_select, observamos que la gran mayoría de los hits son proteínas hemo NO-binding domain-containing, y la proteína query era algo similar por lo tanto podemos decir que los resultados son proteínas con la misma función pero halladas en otras variantes de Clostridium, y en otras especies similares a Clostridium. Unen la NO, grupo hemo.</text:p>
      <text:p text:style-name="P1"/>
      <text:p text:style-name="P1">2a) Las de C. tetani, están muy poco conservadas, ya que no alcanzan el 40% de identidad y la cobertura es menor al 50%</text:p>
      <text:p text:style-name="P1"/>
      <text:p text:style-name="P1">1b) <text:span text:style-name="T1">Presenta 2 dominios, las HNOB (heme NO-binding) y las Tar. El primero proviene de </text:span><text:span text:style-name="T2">PFAM del NCBI</text:span><text:span text:style-name="T1"> y funciona como un sensor dependiente de hemo para ligandos gaseosos y que transduce diversas señales en bacterias y animales. El segundo proviene de </text:span><text:span text:style-name="T2">la base de datos COG del NCBI</text:span><text:span text:style-name="T1"> y su función es ser un sensor ambiental, detectando sustancias químicas en el entorno para enviar una señal al interior de la bacteria para moverse hacia ellas.</text:span></text:p>
      <text:p text:style-name="P1"/>
      <text:p text:style-name="P2">Ejercicio 2</text:p>
      <text:p text:style-name="P2"/>
      <text:p text:style-name="P2">2a) <text:span text:style-name="T3">Aparecen dominios como Heme NO binding, H-NOX domain, NO_sig/Golg_transp..</text:span> <text:span text:style-name="T3">en PFAM, CATHGENE etc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7T11:16:05.066998694</meta:creation-date>
    <dc:date>2026-05-07T12:14:47.030477941</dc:date>
    <meta:editing-duration>PT3M3S</meta:editing-duration>
    <meta:editing-cycles>1</meta:editing-cycles>
    <meta:document-statistic meta:table-count="0" meta:image-count="0" meta:object-count="0" meta:page-count="1" meta:paragraph-count="6" meta:word-count="188" meta:character-count="1107" meta:non-whitespace-character-count="925"/>
    <meta:generator>LibreOffice/24.2.7.2$Linux_X86_64 LibreOffice_project/420$Build-2</meta:generator>
  </office:meta>
</office:document-meta>
</file>