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844" officeooo:paragraph-rsid="0018c844"/>
    </style:style>
    <style:style style:name="P2" style:family="paragraph" style:parent-style-name="Standard">
      <style:text-properties fo:font-weight="normal" officeooo:rsid="0018c844" officeooo:paragraph-rsid="0018c844" style:font-weight-asian="normal" style:font-weight-complex="normal"/>
    </style:style>
    <style:style style:name="P3" style:family="paragraph" style:parent-style-name="Standard">
      <style:text-properties fo:font-weight="normal" officeooo:rsid="00194a50" officeooo:paragraph-rsid="00194a50" style:font-weight-asian="normal" style:font-weight-complex="normal"/>
    </style:style>
    <style:style style:name="P4" style:family="paragraph" style:parent-style-name="Standard">
      <style:text-properties fo:font-weight="normal" officeooo:rsid="001a1b50" officeooo:paragraph-rsid="001a1b50" style:font-weight-asian="normal" style:font-weight-complex="normal"/>
    </style:style>
    <style:style style:name="P5" style:family="paragraph" style:parent-style-name="Standard">
      <style:text-properties fo:font-weight="normal" officeooo:rsid="001b9691" officeooo:paragraph-rsid="001b9691" style:font-weight-asian="normal" style:font-weight-complex="normal"/>
    </style:style>
    <style:style style:name="P6" style:family="paragraph" style:parent-style-name="Standard">
      <style:text-properties fo:font-weight="normal" officeooo:rsid="001eb67a" officeooo:paragraph-rsid="001eb67a" style:font-weight-asian="normal" style:font-weight-complex="normal"/>
    </style:style>
    <style:style style:name="P7" style:family="paragraph" style:parent-style-name="Standard">
      <style:text-properties fo:font-weight="normal" officeooo:rsid="001f3f0d" officeooo:paragraph-rsid="001f3f0d" style:font-weight-asian="normal" style:font-weight-complex="normal"/>
    </style:style>
    <style:style style:name="P8" style:family="paragraph" style:parent-style-name="Standard">
      <style:text-properties fo:font-weight="normal" officeooo:rsid="00201673" officeooo:paragraph-rsid="00220520" style:font-weight-asian="normal" style:font-weight-complex="normal"/>
    </style:style>
    <style:style style:name="P9" style:family="paragraph" style:parent-style-name="Standard">
      <style:text-properties officeooo:paragraph-rsid="00220520"/>
    </style:style>
    <style:style style:name="P10" style:family="paragraph" style:parent-style-name="Standard">
      <style:text-properties officeooo:rsid="00220520" officeooo:paragraph-rsid="00220520"/>
    </style:style>
    <style:style style:name="P11" style:family="paragraph" style:parent-style-name="Standard">
      <style:text-properties officeooo:rsid="0026d6f4" officeooo:paragraph-rsid="0026d6f4"/>
    </style:style>
    <style:style style:name="P12" style:family="paragraph" style:parent-style-name="Standard">
      <style:text-properties officeooo:rsid="0026f119" officeooo:paragraph-rsid="0026f119"/>
    </style:style>
    <style:style style:name="P13" style:family="paragraph" style:parent-style-name="Standard">
      <style:text-properties officeooo:rsid="0028bd58" officeooo:paragraph-rsid="0028bd58"/>
    </style:style>
    <style:style style:name="P14" style:family="paragraph" style:parent-style-name="Standard">
      <style:text-properties fo:font-weight="normal" officeooo:rsid="0020dc18" officeooo:paragraph-rsid="00220520" style:font-weight-asian="normal" style:font-weight-complex="normal"/>
    </style:style>
    <style:style style:name="P15" style:family="paragraph" style:parent-style-name="Standard">
      <style:text-properties fo:font-weight="normal" officeooo:rsid="00194a50" officeooo:paragraph-rsid="00194a50" style:font-weight-asian="normal" style:font-weight-complex="normal"/>
    </style:style>
    <style:style style:name="P16" style:family="paragraph" style:parent-style-name="Standard">
      <style:text-properties officeooo:rsid="002a8cee" officeooo:paragraph-rsid="002a8cee"/>
    </style:style>
    <style:style style:name="P17" style:family="paragraph" style:parent-style-name="Standard">
      <style:text-properties officeooo:rsid="00315335" officeooo:paragraph-rsid="0031533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ac35" style:font-weight-asian="bold" style:font-weight-complex="bold"/>
    </style:style>
    <style:style style:name="T3" style:family="text">
      <style:text-properties officeooo:rsid="00194a50"/>
    </style:style>
    <style:style style:name="T4" style:family="text">
      <style:text-properties officeooo:rsid="001a1b50"/>
    </style:style>
    <style:style style:name="T5" style:family="text">
      <style:text-properties officeooo:rsid="001cc920"/>
    </style:style>
    <style:style style:name="T6" style:family="text">
      <style:text-properties officeooo:rsid="001f3f0d"/>
    </style:style>
    <style:style style:name="T7" style:family="text">
      <style:text-properties officeooo:rsid="0020dc18"/>
    </style:style>
    <style:style style:name="T8" style:family="text">
      <style:text-properties officeooo:rsid="00220520"/>
    </style:style>
    <style:style style:name="T9" style:family="text">
      <style:text-properties fo:font-weight="normal" officeooo:rsid="0020dc18" style:font-weight-asian="normal" style:font-weight-complex="normal"/>
    </style:style>
    <style:style style:name="T10" style:family="text">
      <style:text-properties fo:font-weight="normal" officeooo:rsid="00220520" style:font-weight-asian="normal" style:font-weight-complex="normal"/>
    </style:style>
    <style:style style:name="T11" style:family="text">
      <style:text-properties officeooo:rsid="0023e6a8"/>
    </style:style>
    <style:style style:name="T12" style:family="text">
      <style:text-properties officeooo:rsid="0026d6f4"/>
    </style:style>
    <style:style style:name="T13" style:family="text">
      <style:text-properties officeooo:rsid="0028bd58"/>
    </style:style>
    <style:style style:name="T14" style:family="text">
      <style:text-properties officeooo:rsid="002a8cee"/>
    </style:style>
    <style:style style:name="T15" style:family="text">
      <style:text-properties officeooo:rsid="002dc371"/>
    </style:style>
    <style:style style:name="T16" style:family="text">
      <style:text-properties officeooo:rsid="002fbea0"/>
    </style:style>
    <style:style style:name="T17" style:family="text">
      <style:text-properties officeooo:rsid="00315335"/>
    </style:style>
    <style:style style:name="T18" style:family="text">
      <style:text-properties officeooo:rsid="0032ac1e"/>
    </style:style>
    <style:style style:name="T19" style:family="text">
      <style:text-properties officeooo:rsid="0032ac35"/>
    </style:style>
    <style:style style:name="T20" style:family="text">
      <style:text-properties officeooo:rsid="0034a65a"/>
    </style:style>
    <style:style style:name="T21" style:family="text">
      <style:text-properties officeooo:rsid="003593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<text:span text:style-name="T1">NAVEGANDO LA INFORMACIÓN GENÉTICA DISPONIB</text:span><text:span text:style-name="T2">L</text:span><text:span text:style-name="T1">E EN TARGET-PATHOGEN</text:span></text:p>
      <text:p text:style-name="P1"><text:span text:style-name="T1"/></text:p>
      <text:p text:style-name="P2">a<text:span text:style-name="T3">i</text:span>) E<text:span text:style-name="T19">n</text:span> la sección overview se puede ver que la proteína es esencial.</text:p>
      <text:p text:style-name="P2"/>
      <text:p text:style-name="P3"><text:span text:style-name="T19">a</text:span>ii<text:span text:style-name="T19">) Participa en vías metabólicas que producen bloques necesarios para la sintetización de ADN, como biosíntesis de novo de desoxirribonucleótidos de pirimidina I y II, biosíntesis de formil-THF y vía de rescate de desoxirribonucleósidos de pirimidina.</text:span></text:p>
      <text:p text:style-name="P3"/>
      <text:p text:style-name="P3">aiii) Según la página, es altamente drogable.</text:p>
      <text:p text:style-name="P3"/>
      <text:p text:style-name="P3">aiv) Se encuentra sobreexpresada en los modelos de hipoxia y de estrés <text:span text:style-name="T20">RNOS</text:span></text:p>
      <text:p text:style-name="P3"/>
      <text:p text:style-name="P3">b) Fue <text:span text:style-name="T4">obtenida de forma experimental.</text:span></text:p>
      <text:p text:style-name="P3"/>
      <text:p text:style-name="P4">c) <text:span text:style-name="T20">Aparecen 4 pockets, que son los pockets 1, 2, 9, y 11. Dado que los pockets 1 y 2 son los que tienen mayor espacio en la proteína al visualizarlo con esferas alfa, y su cercanía a los sitios que son conocidos por tener evidencia de posibilidad de unión a fármacos, suponemos que estos son pockets drogables.</text:span></text:p>
      <text:p text:style-name="P4"/>
      <text:p text:style-name="P5">d) <text:span text:style-name="T20">Ya que la proteína es esencial, participa en procesos de sintetización de ADN, muestra sobreexposición frente a la hipoxia y RNOS (moléculas generadas por el sistema inmune para matar al patógeno) y tiene pockets con alta chance de drogabilidad, creemos que esta proteína es un buen blanco para la producción de fármacos.</text:span></text:p>
      <text:p text:style-name="P5"/>
      <text:p text:style-name="P5">2</text:p>
      <text:p text:style-name="P5"/>
      <text:p text:style-name="P5">a<text:span text:style-name="T5">) Quedaron 2316 proteínas, que cumplen con estar en la base de datos de genes esenciales (DEG) y no estar en el proteoma humano.</text:span></text:p>
      <text:p text:style-name="P5"/>
      <text:p text:style-name="P6">b) El valor default de 0.5 puede ser para no excluir falsos negativos por cortar muy alto. Ahora al filtrar quedaron 381 proteínas, con drogabilidad alta y participación en sitios catalíticos, por lo que parecen ser blancos prometedores.</text:p>
      <text:p text:style-name="P6"/>
      <text:p text:style-name="P6">c) Quedaron 27 proteínas, <text:span text:style-name="T6">las cuales parecen buenos candidatos para ser blancos ya que son altamente drogables, estan en el DEG, no tienen homologías en el proteoma humano, participan en sitios catalíticos y en la transmisión de señales intracelulares, por lo que parecen tener una función clave.</text:span></text:p>
      <text:p text:style-name="P6"/>
      <text:p text:style-name="P7">3 </text:p>
      <text:p text:style-name="P7"/>
      <text:p text:style-name="P8"><text:span text:style-name="T7">Distribución:</text:span> </text:p>
      <text:p text:style-name="P8">Se puede observar que hay mas proteínas drogables que no drogables, la gran mayoría de las proteínas no tienen homologías en el proteoma humano, y solo muy pocas son esenciales.</text:p>
      <text:p text:style-name="P7"/>
      <text:p text:style-name="P14">Score: </text:p>
      <text:p text:style-name="P9"><text:span text:style-name="T9">a) </text:span><text:span text:style-name="T10">Los 5 mas altos son: </text:span><text:a xlink:type="simple" xlink:href="http://targetsbg.cluster.qb.fcen.uba.ar/patho/protein/56425910be737e6c7a9fe122" text:style-name="Internet_20_link" text:visited-style-name="Visited_20_Internet_20_Link">Rv3206c</text:a>, <text:a xlink:type="simple" xlink:href="http://targetsbg.cluster.qb.fcen.uba.ar/patho/protein/56425911be737e6c7a9fe263" text:style-name="Internet_20_link" text:visited-style-name="Visited_20_Internet_20_Link">Rv3536c</text:a>, <text:a xlink:type="simple" xlink:href="http://targetsbg.cluster.qb.fcen.uba.ar/patho/protein/56425908be737e6c7a9fd4d0" text:style-name="Internet_20_link" text:visited-style-name="Visited_20_Internet_20_Link">Rv0046c</text:a>, <text:a xlink:type="simple" xlink:href="http://targetsbg.cluster.qb.fcen.uba.ar/patho/protein/56425911be737e6c7a9fe291" text:style-name="Internet_20_link" text:visited-style-name="Visited_20_Internet_20_Link">Rv3581c</text:a> <text:span text:style-name="T8">y </text:span><text:a xlink:type="simple" xlink:href="http://targetsbg.cluster.qb.fcen.uba.ar/patho/protein/5642590dbe737e6c7a9fdd01" text:style-name="Internet_20_link" text:visited-style-name="Visited_20_Internet_20_Link">Rv2153c</text:a></text:p>
      <text:p text:style-name="P10"/>
      <text:p text:style-name="P10">b) Un score de 2 significa, que se sobreexpresa en todo lo seleccionado y que es una proteína de alta centralidad es un chokepoint.</text:p>
      <text:p text:style-name="P10"/>
      <text:p text:style-name="P10"><text:soft-page-break/>c) <text:span text:style-name="T11">El valor de centralidad de la proteína moeB1 es 0.02, que es una de las mas centrales ya que solo hay aproximadamente 25 proteínas con mayor valor. </text:span><text:span text:style-name="T12">Como la drogabilidad y el score son altos, creemos que es un buen blanco.</text:span></text:p>
      <text:p text:style-name="P10"/>
      <text:p text:style-name="P11">4</text:p>
      <text:p text:style-name="P11"/>
      <text:p text:style-name="P12">a) Porque si queremos frenar una reacción y lo hacemos en una vía incompleta, puede pasar que haya otra forma de obtener el resultado de esa reacción.</text:p>
      <text:p text:style-name="P12"/>
      <text:p text:style-name="P12">b) <text:span text:style-name="T13">No hay que usar lo mismo que antes?</text:span></text:p>
      <text:p text:style-name="P12"/>
      <text:p text:style-name="P13">c) <text:span text:style-name="T14">Lo hice pero no hay que contestar nada o si.</text:span></text:p>
      <text:p text:style-name="P13"/>
      <text:p text:style-name="P16">a) <text:span text:style-name="T15">Conserved pathogen bbh se utiliza para ver ortólogos </text:span><text:span text:style-name="T16">en otros patógenos. Si no se toma la versión norm, te da un puntaje bruto, mientras que la norm </text:span><text:span text:style-name="T17">devuelve un resultado normalizado. Nos conviene utilizar la versión normalizada porque así no hay preferencias hacía vías de mayor tamaño y así tiene la misma escala que los otros parámetros.</text:span></text:p>
      <text:p text:style-name="P16"/>
      <text:p text:style-name="P17">a) Para que este parámetro valga lo mismo que la suma de los demás, tendría que dividir por 2 a <text:span text:style-name="T21">l</text:span>a sumatoria y al término por separados, es decir, promediar la sumatoria entera con la P.</text:p>
      <text:p text:style-name="P17"/>
      <text:p text:style-name="P17">b) Las vías con mayor score tienen una alta chance de estar casi completas, tener chokepoints y nodos con alta centralidad, tener proteínas que se encuentren en el DEG, no tener homologías en humanos <text:span text:style-name="T18">y tener genes que se sobreexpresen al haber presencia de polimixina (y que por lo tanto puedan participar en la resistencia antibiótica). Es una buena idea buscar blancos en estas vía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2T14:52:59.928808408</meta:creation-date>
    <dc:date>2026-06-16T16:38:23.768177910</dc:date>
    <meta:editing-duration>PT1H33M5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26" meta:word-count="622" meta:character-count="3614" meta:non-whitespace-character-count="3015"/>
  </office:meta>
</office:document-meta>
</file>