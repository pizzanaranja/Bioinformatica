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7fc5" officeooo:paragraph-rsid="001e7fc5"/>
    </style:style>
    <style:style style:name="P2" style:family="paragraph" style:parent-style-name="Standard">
      <style:text-properties officeooo:rsid="001fc0cb" officeooo:paragraph-rsid="001fc0cb"/>
    </style:style>
    <style:style style:name="P3" style:family="paragraph" style:parent-style-name="Standard">
      <style:text-properties officeooo:rsid="001fd524" officeooo:paragraph-rsid="001fd524"/>
    </style:style>
    <style:style style:name="P4" style:family="paragraph" style:parent-style-name="Standard">
      <style:text-properties officeooo:rsid="002132a9" officeooo:paragraph-rsid="002132a9"/>
    </style:style>
    <style:style style:name="P5" style:family="paragraph" style:parent-style-name="Standard">
      <style:text-properties fo:color="#c9211e" loext:opacity="100%" officeooo:rsid="001fd524" officeooo:paragraph-rsid="001fd524"/>
    </style:style>
    <style:style style:name="P6" style:family="paragraph" style:parent-style-name="Standard">
      <style:text-properties officeooo:rsid="00231bb8" officeooo:paragraph-rsid="00231bb8"/>
    </style:style>
    <style:style style:name="P7" style:family="paragraph" style:parent-style-name="Standard">
      <style:text-properties officeooo:rsid="002781e2" officeooo:paragraph-rsid="002781e2"/>
    </style:style>
    <style:style style:name="P8" style:family="paragraph" style:parent-style-name="Standard">
      <style:text-properties officeooo:rsid="0027e60e" officeooo:paragraph-rsid="0027e60e"/>
    </style:style>
    <style:style style:name="P9" style:family="paragraph" style:parent-style-name="Standard">
      <style:text-properties officeooo:rsid="0027f593" officeooo:paragraph-rsid="0027f593"/>
    </style:style>
    <style:style style:name="P10" style:family="paragraph" style:parent-style-name="Standard">
      <style:text-properties officeooo:rsid="00287ca4" officeooo:paragraph-rsid="00287ca4"/>
    </style:style>
    <style:style style:name="P11" style:family="paragraph" style:parent-style-name="Standard">
      <style:text-properties officeooo:rsid="0027f593" officeooo:paragraph-rsid="0027f593"/>
    </style:style>
    <style:style style:name="T1" style:family="text">
      <style:text-properties officeooo:rsid="001fc0cb"/>
    </style:style>
    <style:style style:name="T2" style:family="text">
      <style:text-properties officeooo:rsid="001fd524"/>
    </style:style>
    <style:style style:name="T3" style:family="text">
      <style:text-properties officeooo:rsid="00210067"/>
    </style:style>
    <style:style style:name="T4" style:family="text">
      <style:text-properties fo:color="#c9211e" loext:opacity="100%" officeooo:rsid="002132a9"/>
    </style:style>
    <style:style style:name="T5" style:family="text">
      <style:text-properties officeooo:rsid="00231bb8"/>
    </style:style>
    <style:style style:name="T6" style:family="text">
      <style:text-properties officeooo:rsid="00240cf5"/>
    </style:style>
    <style:style style:name="T7" style:family="text">
      <style:text-properties officeooo:rsid="0027e60e"/>
    </style:style>
    <style:style style:name="T8" style:family="text">
      <style:text-properties officeooo:rsid="0027f593"/>
    </style:style>
    <style:style style:name="T9" style:family="text">
      <style:text-properties officeooo:rsid="0029046c"/>
    </style:style>
    <style:style style:name="T10" style:family="text">
      <style:text-properties officeooo:rsid="00296cee"/>
    </style:style>
    <style:style style:name="T11" style:family="text">
      <style:text-properties officeooo:rsid="002b38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 Estadísticas generales</text:p>
      <text:p text:style-name="P1"/>
      <text:p text:style-name="P1">1) Se usó el código genético 11, que es el de las bacterias, arqueas y plastidios.</text:p>
      <text:p text:style-name="P1"/>
      <text:p text:style-name="P1">2) <text:span text:style-name="T1">La cantidad de genes que posiblemente falten son 28.</text:span></text:p>
      <text:p text:style-name="P1"/>
      <text:p text:style-name="P2">3) Disponemos de 193 contigs.</text:p>
      <text:p text:style-name="P2"/>
      <text:p text:style-name="P2">4) Se detectaron 49 ARNs.</text:p>
      <text:p text:style-name="P2"/>
      <text:p text:style-name="P2">5) Se detectaron 3303 genes. (cds mas rna)</text:p>
      <text:p text:style-name="P2"/>
      <text:p text:style-name="P2">6) <text:span text:style-name="T2">Se le asignó un subsistema al 39% de los genes.</text:span></text:p>
      <text:p text:style-name="P2"/>
      <text:p text:style-name="P3">7) Los subsistemas mas abundantes son los carbohidratos, aminoácidos, el grupo de cofactores, vitaminas grupos prostéticos y pigmentos, y de metabolismo de RNA.</text:p>
      <text:p text:style-name="P3"/>
      <text:p text:style-name="P3">8) Tienes genes de resistencia a los fluoroquinolones (6), a la vancomicina (1) y 7 genes de bombas de eflujo que pueden expulsar mútliples antibióticos.</text:p>
      <text:p text:style-name="P3"/>
      <text:p text:style-name="P3">Ejercicio 2: Características específicas</text:p>
      <text:p text:style-name="P3"/>
      <text:p text:style-name="P3">1) <text:span text:style-name="T3">Se relacionan 5 genes a este subsistema. </text:span><text:span text:style-name="T4">NI IDEA DEL OPERÓN</text:span></text:p>
      <text:p text:style-name="P5"/>
      <text:p text:style-name="P4">2) <text:span text:style-name="T5">Sospechamos que se trata de una Gram positiva.</text:span></text:p>
      <text:p text:style-name="P4"/>
      <text:p text:style-name="P6">3) <text:span text:style-name="T6">Se encuentran solo fotoliasas, que detectan luz pero no sintetizan azúcares por lo que decimos que este organismo no hace fotosíntesis.</text:span></text:p>
      <text:p text:style-name="P6"/>
      <text:p text:style-name="P7">4) <text:span text:style-name="T7">Se puede observar que hay un camino con genes presentes que lleva de la alfa-D-glucosa al piruvato, por lo que la vía está completa.</text:span></text:p>
      <text:p text:style-name="P7"/>
      <text:p text:style-name="P8">5) <text:span text:style-name="T8">Se comparó a nuestro genoma con la cepa K12 de E. coli. </text:span><text:span text:style-name="T10">Si bien en los metabolismos de <text:s/>cisteína y metionina, y ciclo reductivo de carboxilato las bacterias tienen una covertura similar, la E. coli tiene una cobertura mucho mayor en el metabolismo de metano (aunque sigue sin ser alta) por lo que hay chances de que la E. coli metabolice el metano. También se observa que la E. coli tienen mcuhas mas chances de metabolizar azufre comparado a la exiguobacterium, y que la E. coli tiene mayor cobertura en el metabolismo de glicina, serina y treonina.</text:span></text:p>
      <text:p text:style-name="P8"/>
      <text:p text:style-name="P9">6) Se comparó a nuestro genomas con la cepa CDC1551 de M. tuberculosis. <text:span text:style-name="T10">Tienen una cobertura alta y similar en el ciclo de citrato y en la elongación de ácidos grasos en la mitocondria, mientras que la tuberculosis tiene mayor cobertura de biosíntesis y metabolización de ácidos grasos. Ambos tienen la misma cantidad de enzimas en el metabolismo de glicerolípidos, (9/36) por lo que se podría inferir que no los metabolizan. Además la tuberculosis tiene el 50% de las enzimas requeridas para la síntesis y degradación de cuerpos cetónicos, mientras que la exiguobacterium tiene solo una de seis, por lo que asumimos que no debe ser capaz de realizar dicho proceso.</text:span></text:p>
      <text:p text:style-name="P9"/>
      <text:p text:style-name="P10">7) Los humanos tienen muchos mas genes, debido a que el homo sapiens tiene mucha mas complejidad celular (distintos tejidos, células especializadas) <text:span text:style-name="T9">mientras que la bacteria es unicelular. </text:span><text:span text:style-name="T10">(seguramente se puede escribir m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5T18:22:01.907013374</meta:creation-date>
    <dc:date>2026-06-16T16:59:44.168357692</dc:date>
    <meta:editing-duration>PT12M54S</meta:editing-duration>
    <meta:editing-cycles>3</meta:editing-cycles>
    <meta:generator>LibreOffice/24.2.7.2$Linux_X86_64 LibreOffice_project/420$Build-2</meta:generator>
    <meta:document-statistic meta:table-count="0" meta:image-count="0" meta:object-count="0" meta:page-count="1" meta:paragraph-count="17" meta:word-count="421" meta:character-count="2498" meta:non-whitespace-character-count="2093"/>
  </office:meta>
</office:document-meta>
</file>