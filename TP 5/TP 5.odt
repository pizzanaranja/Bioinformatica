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1243641A317.png" manifest:media-type="image/png"/>
  <manifest:file-entry manifest:full-path="Pictures/100000010000030B000000C73CC8E8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fc5" officeooo:paragraph-rsid="001e7fc5"/>
    </style:style>
    <style:style style:name="P2" style:family="paragraph" style:parent-style-name="Standard">
      <style:text-properties officeooo:rsid="001fc0cb" officeooo:paragraph-rsid="001fc0cb"/>
    </style:style>
    <style:style style:name="P3" style:family="paragraph" style:parent-style-name="Standard">
      <style:text-properties officeooo:rsid="001fd524" officeooo:paragraph-rsid="001fd524"/>
    </style:style>
    <style:style style:name="P4" style:family="paragraph" style:parent-style-name="Standard">
      <style:text-properties officeooo:rsid="002132a9" officeooo:paragraph-rsid="002132a9"/>
    </style:style>
    <style:style style:name="P5" style:family="paragraph" style:parent-style-name="Standard">
      <style:text-properties fo:color="#c9211e" loext:opacity="100%" officeooo:rsid="001fd524" officeooo:paragraph-rsid="001fd524"/>
    </style:style>
    <style:style style:name="P6" style:family="paragraph" style:parent-style-name="Standard">
      <style:text-properties officeooo:rsid="00231bb8" officeooo:paragraph-rsid="00231bb8"/>
    </style:style>
    <style:style style:name="P7" style:family="paragraph" style:parent-style-name="Standard">
      <style:text-properties officeooo:rsid="002781e2" officeooo:paragraph-rsid="002781e2"/>
    </style:style>
    <style:style style:name="P8" style:family="paragraph" style:parent-style-name="Standard">
      <style:text-properties officeooo:rsid="0027e60e" officeooo:paragraph-rsid="0027e60e"/>
    </style:style>
    <style:style style:name="P9" style:family="paragraph" style:parent-style-name="Standard">
      <style:text-properties officeooo:rsid="0027f593" officeooo:paragraph-rsid="0027f593"/>
    </style:style>
    <style:style style:name="P10" style:family="paragraph" style:parent-style-name="Standard">
      <style:text-properties officeooo:rsid="00287ca4" officeooo:paragraph-rsid="00287ca4"/>
    </style:style>
    <style:style style:name="T1" style:family="text">
      <style:text-properties officeooo:rsid="001fc0cb"/>
    </style:style>
    <style:style style:name="T2" style:family="text">
      <style:text-properties officeooo:rsid="001fd524"/>
    </style:style>
    <style:style style:name="T3" style:family="text">
      <style:text-properties officeooo:rsid="00210067"/>
    </style:style>
    <style:style style:name="T4" style:family="text">
      <style:text-properties fo:color="#c9211e" loext:opacity="100%" officeooo:rsid="002132a9"/>
    </style:style>
    <style:style style:name="T5" style:family="text">
      <style:text-properties officeooo:rsid="00231bb8"/>
    </style:style>
    <style:style style:name="T6" style:family="text">
      <style:text-properties officeooo:rsid="00240cf5"/>
    </style:style>
    <style:style style:name="T7" style:family="text">
      <style:text-properties officeooo:rsid="0027e60e"/>
    </style:style>
    <style:style style:name="T8" style:family="text">
      <style:text-properties officeooo:rsid="0027f593"/>
    </style:style>
    <style:style style:name="T9" style:family="text">
      <style:text-properties officeooo:rsid="002904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 Estadísticas generales</text:p>
      <text:p text:style-name="P1"/>
      <text:p text:style-name="P1">1) Se usó el código genético 11, que es el de las bacterias, arqueas y plastidios.</text:p>
      <text:p text:style-name="P1"/>
      <text:p text:style-name="P1">2) <text:span text:style-name="T1">La cantidad de genes que posiblemente falten son 28.</text:span></text:p>
      <text:p text:style-name="P1"/>
      <text:p text:style-name="P2">3) Disponemos de 193 contigs.</text:p>
      <text:p text:style-name="P2"/>
      <text:p text:style-name="P2">4) Se detectaron 49 ARNs.</text:p>
      <text:p text:style-name="P2"/>
      <text:p text:style-name="P2">5) Se detectaron 3303 genes. (cds mas rna)</text:p>
      <text:p text:style-name="P2"/>
      <text:p text:style-name="P2">6) <text:span text:style-name="T2">Se le asignó un subsistema al 39% de los genes.</text:span></text:p>
      <text:p text:style-name="P2"/>
      <text:p text:style-name="P3">7) Los subsistemas mas abundantes son los carbohidratos, aminoácidos, el grupo de cofactores, vitaminas grupos prostéticos y pigmentos, y de metabolismo de RNA.</text:p>
      <text:p text:style-name="P3"/>
      <text:p text:style-name="P3">8) Tienes genes de resistencia a los fluoroquinolones (6), a la vancomicina (1) y 7 genes de bombas de eflujo que pueden expulsar mútliples antibióticos.</text:p>
      <text:p text:style-name="P3"/>
      <text:p text:style-name="P3">Ejercicio 2: Características específicas</text:p>
      <text:p text:style-name="P3"/>
      <text:p text:style-name="P3">1) <text:span text:style-name="T3">Se relacionan 5 genes a este subsistema. </text:span><text:span text:style-name="T4">NI IDEA DEL OPERÓN</text:span></text:p>
      <text:p text:style-name="P5"/>
      <text:p text:style-name="P4">2) <text:span text:style-name="T5">Sospechamos que se trata de una Gram positiva.</text:span></text:p>
      <text:p text:style-name="P4"/>
      <text:p text:style-name="P6">3) <text:span text:style-name="T6">Se encuentran solo fotoliasas, que detectan luz pero no sintetizan azúcares por lo que decimos que este organismo no hace fotosíntesis.</text:span></text:p>
      <text:p text:style-name="P6"/>
      <text:p text:style-name="P7">4) <text:span text:style-name="T7">Se puede observar que hay un camino con genes presentes que lleva de la alfa-D-glucosa al piruvato, por lo que la vía está completa.</text:span></text:p>
      <text:p text:style-name="P7"/>
      <text:p text:style-name="P8">5) <text:span text:style-name="T8">Se comparó a nuestro genoma con la cepa K12 de E. coli.</text:span></text:p>
      <text:p text:style-name="P8"><draw:frame draw:style-name="fr2" draw:name="Imagen1" text:anchor-type="char" svg:width="16.489cm" svg:height="4.212cm" draw:z-index="0"><draw:image xlink:href="Pictures/100000010000030B000000C73CC8E808.png" xlink:type="simple" xlink:show="embed" xlink:actuate="onLoad" draw:mime-type="image/png"/></draw:frame></text:p>
      <text:p text:style-name="P8"/>
      <text:p text:style-name="P9">6) Se comparó a nuestro genomas con la cepa CDC1551 de M. tuberculosis.</text:p>
      <text:p text:style-name="P10"><draw:frame draw:style-name="fr1" draw:name="Imagen2" text:anchor-type="char" svg:width="17cm" svg:height="5.241cm" draw:z-index="1"><draw:image xlink:href="Pictures/10000001000003B3000001243641A317.png" xlink:type="simple" xlink:show="embed" xlink:actuate="onLoad" draw:mime-type="image/png"/></draw:frame><text:soft-page-break/>7) Los humanos tienen muchos mas genes, debido a que el homo sapiens tiene mucha mas complejidad celular (distintos tejidos, células especializadas) <text:span text:style-name="T9">mientras que la bacteria es unicelula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18:22:01.907013374</meta:creation-date>
    <dc:date>2026-05-16T02:38:18.893863659</dc:date>
    <meta:editing-duration>PT11M38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17" meta:word-count="233" meta:character-count="1372" meta:non-whitespace-character-count="1156"/>
  </office:meta>
</office:document-meta>
</file>